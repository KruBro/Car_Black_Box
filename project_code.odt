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</office:automatic-styles>
  <office:body>
    <office:text>
      <text:p text:style-name="Text_20_body">/** * @file blackbox_drivers.h * @author krubro * @date 2026-05-09 * @brief Unified peripheral driver API for the Car Black Box project. <text:span text:style-name="T1"> </text:span> @note Include main_config.h in application code, not this file directly. * FOSC and _XTAL_FREQ must be defined before this header is processed. */</text:p>
      <text:p text:style-name="Text_20_body">#ifndef BLACKBOX_DRIVERS_H #define BLACKBOX_DRIVERS_H</text:p>
      <text:p text:style-name="Text_20_body">#include &lt;xc.h&gt;</text:p>
      <text:p text:style-name="Text_20_body">/* ========================================================================= * SECTION 1 — USART (RC6 = TX, RC7 = RX) * ========================================================================= */</text:p>
      <text:p text:style-name="Text_20_body">void initUART(unsigned long baud); unsigned char uart_getchar(void); /* Non-blocking: returns 0 if no data <text:span text:style-name="T1">/ unsigned char uart_data_ready(void); /</text:span> Returns 1 if RX buffer has a byte <text:span text:style-name="T1">/ void uart_putchar(unsigned char ch); void uart_puts(const char </text:span>str);</text:p>
      <text:p text:style-name="Text_20_body">/* ========================================================================= * SECTION 2 — I2C MSSP Master (RC3 = SCL, RC4 = SDA) * ========================================================================= */</text:p>
      <text:p text:style-name="Text_20_body">void initI2C(unsigned long baud); void i2c_start(void); void i2c_stop(void); void i2c_repeat_start(void); int i2c_write(unsigned char data); unsigned char i2c_read(unsigned char ack);</text:p>
      <text:p text:style-name="Text_20_body">/* ========================================================================= * SECTION 3 — CLCD HD44780 16x2, 8-bit parallel (PORTD, RE1=EN, RE2=RS) * ========================================================================= */</text:p>
      <text:p text:style-name="Text_20_body">#define CLCD_DATA_PORT_DDR TRISD #define CLCD_RS_DDR TRISE2 #define CLCD_EN_DDR TRISE1 #define CLCD_DATA_PORT PORTD #define CLCD_RS RE2 #define CLCD_EN RE1</text:p>
      <text:p text:style-name="Text_20_body">#define INST_MODE 0 #define DATA_MODE 1</text:p>
      <text:p text:style-name="Text_20_body">#define HI 1 #define LOW 0</text:p>
      <text:p text:style-name="Text_20_body">#define LINE1(x) (0x80U + (x)) #define LINE2(x) (0xC0U + (x))</text:p>
      <text:p text:style-name="Text_20_body">#define EIGHT_BIT_MODE 0x33U #define TWO_LINES_5x8_8_BIT_MODE 0x38U #define CLEAR_DISP_SCREEN 0x01U #define DISP_ON_AND_CURSOR_OFF 0x0CU</text:p>
      <text:p text:style-name="Text_20_body">void init_clcd(void); void clcd_putch(const char data, unsigned char addr); void clcd_print(const char *str, unsigned char addr); void clcd_clear(void);</text:p>
      <text:p text:style-name="Text_20_body">/* ========================================================================= * SECTION 4 — DS1307 RTC (I2C addr 0x68, registers in BCD format) * ========================================================================= */</text:p>
      <text:p text:style-name="Text_20_body">#define SLAVE_WRITE 0xD0U #define SLAVE_READ 0xD1U #define SEC_ADDRESS 0x00U #define MIN_ADDRESS 0x01U #define HOUR_ADDRESS 0x02U</text:p>
      <text:p text:style-name="Text_20_body">void init_rtc(void); unsigned char ds1307_i2c_read(unsigned char address); void ds1307_i2c_write(unsigned char data, unsigned char address);</text:p>
      <text:p text:style-name="Text_20_body">/* ========================================================================= * SECTION 5 — Digital Keypad 6-switch active-low on PORTB (RB0-RB5) * ========================================================================= */</text:p>
      <text:p text:style-name="Text_20_body">#define SW1 0x3EU #define SW2 0x3DU #define SW3 0x3BU #define SW4 0x37U #define SW5 0x2FU #define SW6 0x1FU</text:p>
      <text:p text:style-name="Text_20_body">#define KEYPAD_PORT PORTB #define ALL_RELEASED 0x3FU</text:p>
      <text:p text:style-name="Text_20_body">#define LEVEL 1 #define EDGE 0</text:p>
      <text:p text:style-name="Text_20_body">void init_digital_keypad(void); unsigned char read_digital_keypad(unsigned char trigger_method);</text:p>
      <text:p text:style-name="Text_20_body">/* ========================================================================= * SECTION 6 — ADC 10-bit, right-justified (AN0-AN7 on PORTA/PORTE) * ========================================================================= */</text:p>
      <text:p text:style-name="Text_20_body">#define CHANNEL0 0 #define CHANNEL1 1</text:p>
      <text:p text:style-name="Text_20_body">void initADC(void); unsigned short read_adc(unsigned char channel);</text:p>
      <text:p text:style-name="Text_20_body">#endif /* BLACKBOX_DRIVERS_H *//** * @file dashboard.h * @author krubro * @date 2026-05-09 * @brief Dashboard module — split into update (state) and render (display). <text:span text:style-name="T1"> </text:span> update reads hardware, modifies sys. render reads sys, writes LCD. * Neither calls the other. main.c sequences them explicitly. */</text:p>
      <text:p text:style-name="Text_20_body">#ifndef DASHBOARD_H #define DASHBOARD_H</text:p>
      <text:p text:style-name="Text_20_body">#include “events.h”</text:p>
      <text:p text:style-name="Text_20_body">/* Reads RTC + ADC, processes gear/crash events, updates sys. No LCD writes. */ void dashboard_update(EVENT evt);</text:p>
      <text:p text:style-name="Text_20_body">/* Reads sys, writes LCD. No hardware reads, no state mutations. */ void dashboard_render(void);</text:p>
      <text:p text:style-name="Text_20_body">/* Forces speed cache to invalidate so render redraws on next entry. */ void invalidate_dashboard_cache(void);</text:p>
      <text:p text:style-name="Text_20_body">#endif /* DASHBOARD_H *//** * @file eeprom.h * @brief AT24C02/AT24C04 external EEPROM — circular log driver. <text:span text:style-name="T1"> </text:span> Record format (11 ASCII bytes per entry, no null terminator stored): <text:span text:style-name="T1"> </text:span> “HHMMSSGxSSS” → e.g. “235959G3085” * ^^ hours (2 digits, BCD decoded) * ^^ minutes (2 digits, BCD decoded) * ^^ seconds (2 digits, BCD decoded) * ^ literal ‘G’ prefix * ^ gear digit (0=R, 1=N, 2=1st … 5=4th) — or ‘C’ on crash * ^^^ speed (3 digits, 000–100) <text:span text:style-name="T1"> </text:span> Memory layout: <text:span text:style-name="T1"> </text:span> Addr 0x00 head (1 byte — next write slot, 0–9) * Addr 0x01 count (1 byte — valid entries, 0–10) * Addr 0x02 [slot 0] 11 bytes * Addr 0x0D [slot 1] 11 bytes * … * Addr 0x68 [slot 9] 11 bytes (last byte at 0x72) <text:span text:style-name="T1"> </text:span> Addr 0xF0–0xF3 PIN password (4 bytes, ASCII ‘0’ or ‘1’) <text:span text:style-name="T1"> </text:span> Total log used: 2 + (10 × 11) = 112 bytes. * Password region: 4 bytes at 0xF0 — safely outside the 112-byte log ring. */</text:p>
      <text:p text:style-name="Text_20_body">#ifndef EEPROM_H #define EEPROM_H</text:p>
      <text:p text:style-name="Text_20_body">#include “main_config.h”</text:p>
      <text:p text:style-name="Text_20_body">/* ————————————————————————- * EEPROM chip selection * ————————————————————————- */ #define EEPROM_TYPE 4 // 2 = AT24C02 (256 B), 4 = AT24C04 (512 B)</text:p>
      <text:p text:style-name="Text_20_body">// I2C address bytes (A2=A1=A0=0 on PICGENIOS) #define EEPROM_WRITE_BASE 0xA0U // 0b10100000 #define EEPROM_READ_BASE 0xA1U // 0b10100001</text:p>
      <text:p text:style-name="Text_20_body">#define EEPROM_POLL_TIMEOUT 50U // ACK poll retries after a write</text:p>
      <text:p text:style-name="Text_20_body">/* ————————————————————————- * Log layout constants * ————————————————————————- */ #define LOG_MAX_ENTRIES 10U // Circular buffer depth #define LOG_RECORD_SIZE 11U // Bytes per entry (ASCII, no null)</text:p>
      <text:p text:style-name="Text_20_body">#define LOG_HEAD_ADDR 0x00U // Header byte 0: next-write slot index #define LOG_COUNT_ADDR 0x01U // Header byte 1: valid entry count #define LOG_DATA_START 0x02U // First record starts here</text:p>
      <text:p text:style-name="Text_20_body">/* ————————————————————————- * Password storage — 4 bytes at a fixed address outside the log ring. * The log ring ends at 0x72 (slot 9 last byte). 0xF0 gives a safe margin. * ————————————————————————- */ #define EEPROM_PASS_ADDR 0x00F0U // Address of the 4-byte PIN (ASCII ‘0’/‘1’)</text:p>
      <text:p text:style-name="Text_20_body">/* ————————————————————————- * Public API * ————————————————————————- */</text:p>
      <text:p text:style-name="Text_20_body">/** @brief Writes one LOG_ENTRY to the next circular slot. Returns 1 on success. <text:span text:style-name="T1">/ unsigned char eeprom_write_log(const LOG_ENTRY </text:span>entry);</text:p>
      <text:p text:style-name="Text_20_body">/** @brief Reads entry at logical index into a null-terminated 12-byte string. <text:span text:style-name="T1">/ void eeprom_read_log(unsigned char index, char </text:span>buf);</text:p>
      <text:p text:style-name="Text_20_body">/** @brief Returns the number of valid log entries (0–10). */ unsigned char eeprom_get_entry_count(void);</text:p>
      <text:p text:style-name="Text_20_body">/** @brief Erases the log by resetting head and count to zero. */ unsigned char eeprom_clear_log(void);</text:p>
      <text:p text:style-name="Text_20_body">// Low-level byte access — used by log driver and login_load_password / set_password unsigned char eeprom_write_byte(unsigned int addr, unsigned char data); unsigned char eeprom_read_byte(unsigned int addr);</text:p>
      <text:p text:style-name="Text_20_body">#endif /* EEPROM_H *//** * @file events.h * @author krubro * @date 2026-05-09 * @brief Application event model. Translates raw hardware keycodes into * semantic events before they enter any state-update function. <text:span text:style-name="T1"> </text:span> Rule: every module that reacts to user input takes an EVENT, never a raw * keypad byte. The keypad is hardware; the EVENT is application logic. */</text:p>
      <text:p text:style-name="Text_20_body">#ifndef EVENTS_H #define EVENTS_H</text:p>
      <text:p text:style-name="Text_20_body">typedef enum { EVENT_NONE = 0, EVENT_SW1, /* Dashboard: crash / Login: back / Menu: back <text:span text:style-name="T1">/ EVENT_SW2, /</text:span> Dashboard: gear up / Menu: scroll down <text:span text:style-name="T1">/ EVENT_SW3, /</text:span> Dashboard: gear down / Menu: scroll up <text:span text:style-name="T1">/ EVENT_SW4, /</text:span> Dashboard: enter login / Login: digit ‘0’ / select <text:span text:style-name="T1">/ EVENT_SW5, /</text:span> Login: digit ‘1’ */ EVENT_SW6 } EVENT;</text:p>
      <text:p text:style-name="Text_20_body">/* Converts a raw keypad byte (SW1-SW6 mask or ALL_RELEASED) to an EVENT. */ EVENT translate_key(unsigned char key);</text:p>
      <text:p text:style-name="Text_20_body">#endif /* EVENTS_H *//** * @file login.h * @author krubro * @date 2026-05-09 */</text:p>
      <text:p text:style-name="Text_20_body">#ifndef LOGIN_H #define LOGIN_H</text:p>
      <text:p text:style-name="Text_20_body">#include “events.h”</text:p>
      <text:p text:style-name="Text_20_body">#define PASS_LENGTH 4</text:p>
      <text:p text:style-name="Text_20_body">/* Progressive lockout — fails before permanent lock: * Fail 1 → 30 s cooldown * Fail 2 → 45 s cooldown * Fail 3 → 60 s cooldown * Fail 4 → 120 s cooldown * Fail 5 → Device Locked — Contact Admin (permanent) */ #define MAX_FAILS 5U</text:p>
      <text:p text:style-name="Text_20_body">void login_update(EVENT evt); void login_render(void); void login_reset(void);</text:p>
      <text:p text:style-name="Text_20_body">unsigned char is_logged_in(void); // 1 = authenticated session active void do_logout(void); // Clears the logged-in flag</text:p>
      <text:p text:style-name="Text_20_body">// Called once in init_config() — loads PIN from EEPROM into RAM // Falls back to default “1111” if EEPROM is unprogrammed (reads 0xFF) void login_load_password(void);</text:p>
      <text:p text:style-name="Text_20_body">// Called by set_password after a successful change — updates live PIN in RAM void login_set_password(const unsigned char *new_pass);</text:p>
      <text:p text:style-name="Text_20_body">#endif /* LOGIN_H *//** * @file main_config.h * @author krubro * @date 2026-05-09 * @brief Global project configuration — hardware constants, types, includes. */</text:p>
      <text:p text:style-name="Text_20_body">#ifndef MAIN_CONFIG_H #define MAIN_CONFIG_H</text:p>
      <text:p text:style-name="Text_20_body">#pragma config FOSC = HS #pragma config WDTE = OFF #pragma config PWRTE = OFF #pragma config BOREN = ON #pragma config LVP = OFF #pragma config CPD = OFF #pragma config WRT = OFF #pragma config CP = OFF</text:p>
      <text:p text:style-name="Text_20_body">#ifndef _XTAL_FREQ #define _XTAL_FREQ 20000000UL #endif</text:p>
      <text:p text:style-name="Text_20_body">#ifndef FOSC #define FOSC 20000000UL #endif</text:p>
      <text:p text:style-name="Text_20_body">/* ————————————————————————- * Gear state — index maps directly into the event[] render array. * ————————————————————————- */ typedef enum { GR = 0, GN, G1, G2, G3, G4 } GEAR_STATE;</text:p>
      <text:p text:style-name="Text_20_body">/* ————————————————————————- * Event flags — bitmask stored in SYSTEM_STATE.flags and LOG_ENTRY.flags. * ————————————————————————- */ #define FLAG_IGNITION_ON 0x01U #define FLAG_CRASH 0x02U</text:p>
      <text:p text:style-name="Text_20_body">/* ————————————————————————- * EEPROM log entry — packed when writing; field order must not change. * ————————————————————————- */ typedef struct { unsigned char hours; unsigned char minutes; unsigned char seconds; unsigned char speed; unsigned char gear; unsigned char flags; } LOG_ENTRY;</text:p>
      <text:p text:style-name="Text_20_body">/* ————————————————————————- * SYSTEM_STATE — single authoritative vehicle state. <text:span text:style-name="T1"> </text:span> Ownership rules: * hours / minutes / seconds — written by dashboard_update() from DS1307. * gear / flags — written by dashboard_update() from keypad. * speed — written by dashboard_update() from ADC. * log_pending — set by dashboard_update(), cleared by main(). * ————————————————————————- */ typedef struct { unsigned char hours; unsigned char minutes; unsigned char seconds; GEAR_STATE gear; unsigned char speed; unsigned char flags; unsigned char log_pending; } SYSTEM_STATE;</text:p>
      <text:p text:style-name="Text_20_body">extern SYSTEM_STATE sys; // Defined once in main.c</text:p>
      <text:p text:style-name="Text_20_body">/* ————————————————————————- * Headers — lower layers first; types above must be defined before eeprom.h * ————————————————————————- */ #include &lt;xc.h&gt; #include “blackbox_drivers.h” #include “events.h” #include “timer.h” #include “eeprom.h” #include “state.h” #include “login.h” #include “set_password.h” #include “set_time.h” #include “view_logs.h” #include “menu.h” #include “dashboard.h”</text:p>
      <text:p text:style-name="Text_20_body">#endif /* MAIN_CONFIG_H *//** * @file menu.h * @author krubro * @date 2026-05-09 */</text:p>
      <text:p text:style-name="Text_20_body">#ifndef MENU_H #define MENU_H</text:p>
      <text:p text:style-name="Text_20_body">#include “events.h”</text:p>
      <text:p text:style-name="Text_20_body">void menu_update(EVENT evt); void menu_render(void); void menu_reset(void);</text:p>
      <text:p text:style-name="Text_20_body">#endif /* MENU_H *//** * @file set_password.h * @author krubro * @date 2026-05-09 * @brief Change-password state — dual-buffer PIN entry, 10 s timeout, update/render split. <text:span text:style-name="T1"> </text:span> Flow: * CP_ENTER_NEW → user types 4-digit new PIN (SW4=‘0’, SW5=‘1’) * CP_RE_ENTER → user re-types to confirm * CP_MATCH → render shows “PASS CHANGED”, writes to EEPROM, → MENU * CP_MISMATCH → render shows “MISMATCH!”, resets to CP_ENTER_NEW <text:span text:style-name="T1"> </text:span> Timing: * Cursor blink : BLINK_THRESHOLD * ~10 ms = ~200 ms (Timer0) * Idle timeout : CP_TIMEOUT_TICKS * ~100 ms = 10 s (Timer1) * Entry cooldown: COOLDOWN_TICKS blink ticks = ~200 ms (Timer0, same as login) */</text:p>
      <text:p text:style-name="Text_20_body">#ifndef SET_PASSWORD_H #define SET_PASSWORD_H</text:p>
      <text:p text:style-name="Text_20_body">#include “events.h”</text:p>
      <text:p text:style-name="Text_20_body">void set_password_reset(void); // Call once on transition INTO CHANGE_PASSWORD state void set_password_update(EVENT evt); void set_password_render(void);</text:p>
      <text:p text:style-name="Text_20_body">#endif /* SET_PASSWORD_H *//** * @file set_time.h * @author krubro * @date 2026-05-09 * @brief Set-time state — field-by-field RTC editing with copy isolation, update/render split. <text:span text:style-name="T1"> </text:span> Controls: * SW4 — increment active field (with rollover) * SW5 — decrement active field (with underflow protection) * SW6 — cycle active field: HH → MM → SS → HH * SW1 — discard all edits and return to MENU * SW2 — commit copy to DS1307 and return to MENU <text:span text:style-name="T1"> </text:span> Design rule: * set_time_reset() copies sys.hours/minutes/seconds into a local buffer. * All edits modify the local buffer only. * SW1 discards the buffer — the DS1307 is never touched. * SW2 flushes the buffer to the DS1307 via ds1307_i2c_write(). */</text:p>
      <text:p text:style-name="Text_20_body">#ifndef SET_TIME_H #define SET_TIME_H</text:p>
      <text:p text:style-name="Text_20_body">#include “events.h”</text:p>
      <text:p text:style-name="Text_20_body">void set_time_reset(void); // Call once on transition INTO SET_TIME state void set_time_update(EVENT evt); void set_time_render(void);</text:p>
      <text:p text:style-name="Text_20_body">#endif /* SET_TIME_H */#ifndef STATE_H #define STATE_H</text:p>
      <text:p text:style-name="Text_20_body">typedef enum { DASHBOARD, LOGIN, MENU, VIEW_LOGS, CLEAR_LOGS, DOWNLOAD_LOGS, SET_TIME, CHANGE_PASSWORD } STATE;</text:p>
      <text:p text:style-name="Text_20_body">void set_status(STATE new_status); STATE get_status(); #endif/** * @file timer.h * @author krubro * @date 2026-05-08 * @brief Hardware timer driver — Timer0 (10 ms tick) and Timer1 (100 ms tick). <text:span text:style-name="T1"> </text:span> @note Call init_timers() once before the main loop. * Read blink_tick and timeout_tick from any module; reset via helpers. */</text:p>
      <text:p text:style-name="Text_20_body">#ifndef TIMER_H #define TIMER_H</text:p>
      <text:p text:style-name="Text_20_body">#include &lt;xc.h&gt;</text:p>
      <text:p text:style-name="Text_20_body">// Tick counters written by ISR, read by application modules extern volatile unsigned char blink_tick; // Incremented every ~10 ms (Timer0) extern volatile unsigned int timeout_tick; // Incremented every ~100 ms (Timer1)</text:p>
      <text:p text:style-name="Text_20_body">/** @brief Configures Timer0 and Timer1, enables interrupts. */ void init_timers(void);</text:p>
      <text:p text:style-name="Text_20_body">/** @brief Resets the blink tick counter to zero. */ void reset_blink_tick(void);</text:p>
      <text:p text:style-name="Text_20_body">/** @brief Resets the timeout tick counter to zero. */ void reset_timeout_tick(void);</text:p>
      <text:p text:style-name="Text_20_body">#endif /* TIMER_H *//** * @file view_logs.h * @author krubro * @date 2026-05-09 */</text:p>
      <text:p text:style-name="Text_20_body">#ifndef VIEW_LOGS_H #define VIEW_LOGS_H</text:p>
      <text:p text:style-name="Text_20_body">#include “events.h”</text:p>
      <text:p text:style-name="Text_20_body">void view_logs_update(EVENT evt); void view_logs_render(void); void view_logs_reset(void);</text:p>
      <text:p text:style-name="Text_20_body">void download_logs(void); /* Runs once, dumps UART, auto-transitions to MENU. */ void clear_logs(void);</text:p>
      <text:p text:style-name="Text_20_body">#endif /* VIEW_LOGS_H *//** * @file blackbox_drivers.c * @author krubro * @date 2026-05-09 * @brief Unified peripheral driver implementation for the Car Black Box. */</text:p>
      <text:p text:style-name="Text_20_body">#include “main_config.h”</text:p>
      <text:p text:style-name="Text_20_body">/* ========================================================================= * SECTION 1 — USART * ========================================================================= */</text:p>
      <text:p text:style-name="Text_20_body">void initUART(unsigned long baud) { SPEN = 1; SYNC = 0; CREN = 1; BRGH = 1; SPBRG = (unsigned char)((FOSC / (16UL * baud)) - 1UL); TXEN = 1; }</text:p>
      <text:p text:style-name="Text_20_body">/* FIX: Non-blocking. Returns 0 if no byte is waiting. Check uart_data_ready() * first when distinguishing “no data” from a genuine 0x00 in the stream. */ unsigned char uart_getchar(void) { if (OERR) { CREN = 0; CREN = 1; } if (!RCIF) return 0; if (FERR) { (void)RCREG; return 0; } return RCREG; }</text:p>
      <text:p text:style-name="Text_20_body">unsigned char uart_data_ready(void) { return RCIF; }</text:p>
      <text:p text:style-name="Text_20_body">void uart_putchar(unsigned char ch) { while (!TXIF); TXREG = ch; }</text:p>
      <text:p text:style-name="Text_20_body">void uart_puts(const char <text:span text:style-name="T1">str) { while (</text:span>str != ‘\0’) { if(<text:span text:style-name="T1">str == </text:span>‘’<text:span text:style-name="T1">) uart_putchar(’</text:span><text:span text:style-name="T1">); uart_putchar((unsigned char)</text:span>str); str++; } }</text:p>
      <text:p text:style-name="Text_20_body">/* ========================================================================= * SECTION 2 — I2C (MSSP Master) * ========================================================================= */</text:p>
      <text:p text:style-name="Text_20_body">static void i2c_wait_for_idle(void) { while (R_nW || (SSPCON2 &amp; 0x1F)); }</text:p>
      <text:p text:style-name="Text_20_body">void initI2C(unsigned long baud) { SSPM3 = 1; SSPM2 = 0; SSPM1 = 0; SSPM0 = 0; SSPADD = (unsigned char)((FOSC / (4UL * baud)) - 1UL); TRISC3 = 1; TRISC4 = 1; SSPEN = 1; }</text:p>
      <text:p text:style-name="Text_20_body">void i2c_start(void) { i2c_wait_for_idle(); SEN = 1; } void i2c_repeat_start(void){ i2c_wait_for_idle(); RSEN = 1; } void i2c_stop(void) { i2c_wait_for_idle(); PEN = 1; }</text:p>
      <text:p text:style-name="Text_20_body">int i2c_write(unsigned char data) { i2c_wait_for_idle(); SSPBUF = data; i2c_wait_for_idle(); return !ACKSTAT; }</text:p>
      <text:p text:style-name="Text_20_body">unsigned char i2c_read(unsigned char ack) { unsigned char data; i2c_wait_for_idle(); RCEN = 1; i2c_wait_for_idle(); data = SSPBUF; ACKDT = (ack == 1) ? 1 : 0; ACKEN = 1; return data; }</text:p>
      <text:p text:style-name="Text_20_body">/* ========================================================================= * SECTION 3 — CLCD (HD44780 16x2, 8-bit parallel) * ========================================================================= */</text:p>
      <text:p text:style-name="Text_20_body">static void clcd_write(unsigned char byte, unsigned char mode) { CLCD_RS = mode; CLCD_DATA_PORT = byte; CLCD_EN = HI; __delay_us(100); CLCD_EN = LOW; __delay_us(4100); }</text:p>
      <text:p text:style-name="Text_20_body">static void init_display_controller(void) { __delay_ms(30); clcd_write(EIGHT_BIT_MODE, INST_MODE); __delay_us(4100); clcd_write(EIGHT_BIT_MODE, INST_MODE); __delay_us(100); clcd_write(EIGHT_BIT_MODE, INST_MODE); __delay_us(1); clcd_write(TWO_LINES_5x8_8_BIT_MODE, INST_MODE); __delay_us(100); clcd_write(CLEAR_DISP_SCREEN, INST_MODE); __delay_us(500); clcd_write(DISP_ON_AND_CURSOR_OFF, INST_MODE); __delay_us(100); }</text:p>
      <text:p text:style-name="Text_20_body">void init_clcd(void) { CLCD_DATA_PORT_DDR = 0x00; CLCD_RS_DDR = 0; CLCD_EN_DDR = 0; init_display_controller(); }</text:p>
      <text:p text:style-name="Text_20_body">void clcd_putch(const char data, unsigned char addr) { clcd_write(addr, INST_MODE); clcd_write((unsigned char)data, DATA_MODE); }</text:p>
      <text:p text:style-name="Text_20_body">void clcd_print(const char <text:span text:style-name="T1">str, unsigned char addr) { clcd_write(addr, INST_MODE); while (</text:span>str != ‘\0’) { clcd_write((unsigned char)*str, DATA_MODE); str++; } }</text:p>
      <text:p text:style-name="Text_20_body">void clcd_clear(void) { clcd_write(CLEAR_DISP_SCREEN, INST_MODE); __delay_ms(2); }</text:p>
      <text:p text:style-name="Text_20_body">/* ========================================================================= * SECTION 4 — DS1307 RTC * ========================================================================= */</text:p>
      <text:p text:style-name="Text_20_body">void init_rtc(void) { unsigned char sec_reg = ds1307_i2c_read(SEC_ADDRESS); ds1307_i2c_write(sec_reg &amp; 0x7FU, SEC_ADDRESS); /* Clear CH bit */ }</text:p>
      <text:p text:style-name="Text_20_body">unsigned char ds1307_i2c_read(unsigned char address) { unsigned char data; i2c_start(); i2c_write(SLAVE_WRITE); i2c_write(address); i2c_repeat_start(); i2c_write(SLAVE_READ); data = i2c_read(1); i2c_stop(); return data; }</text:p>
      <text:p text:style-name="Text_20_body">void ds1307_i2c_write(unsigned char data, unsigned char address) { i2c_start(); i2c_write(SLAVE_WRITE); i2c_write(address); i2c_write(data); i2c_stop(); }</text:p>
      <text:p text:style-name="Text_20_body">/* ========================================================================= * SECTION 5 — Digital Keypad * ========================================================================= */</text:p>
      <text:p text:style-name="Text_20_body">void init_digital_keypad(void) { TRISB = 0xFF; KEYPAD_PORT = 0xFF; }</text:p>
      <text:p text:style-name="Text_20_body">unsigned char read_digital_keypad(unsigned char trigger_method) { static unsigned char once = 1;</text:p>
      <text:p text:style-name="P1">if (trigger_method == LEVEL)</text:p>
      <text:p text:style-name="P2"><text:s text:c="4"/>return (unsigned char)(KEYPAD_PORT &amp; ALL_RELEASED);</text:p>
      <text:p text:style-name="P3"/>
      <text:p text:style-name="P4">if ((KEYPAD_PORT &amp; ALL_RELEASED) != ALL_RELEASED &amp;&amp; once)</text:p>
      <text:p text:style-name="P5">{</text:p>
      <text:p text:style-name="P6"><text:s text:c="4"/>for (unsigned int i = 0U; i &lt; 500U; i++);</text:p>
      <text:p text:style-name="P7"><text:s text:c="4"/>if ((KEYPAD_PORT &amp; ALL_RELEASED) != ALL_RELEASED)</text:p>
      <text:p text:style-name="P8"><text:s text:c="4"/>{</text:p>
      <text:p text:style-name="P9"><text:s text:c="8"/>once = 0;</text:p>
      <text:p text:style-name="P10"><text:s text:c="8"/>return (unsigned char)(KEYPAD_PORT &amp; ALL_RELEASED);</text:p>
      <text:p text:style-name="P11"><text:s text:c="4"/>}</text:p>
      <text:p text:style-name="P12">}</text:p>
      <text:p text:style-name="P13">else if ((KEYPAD_PORT &amp; ALL_RELEASED) == ALL_RELEASED)</text:p>
      <text:p text:style-name="P14">{</text:p>
      <text:p text:style-name="P15"><text:s text:c="4"/>once = 1;</text:p>
      <text:p text:style-name="P16">}</text:p>
      <text:p text:style-name="P17">return ALL_RELEASED;</text:p>
      <text:p text:style-name="First_20_paragraph">}</text:p>
      <text:p text:style-name="Text_20_body">/* ========================================================================= * SECTION 6 — ADC * ========================================================================= */</text:p>
      <text:p text:style-name="Text_20_body">void initADC(void) { ADCS0 = 0; ADCS1 = 1; ADCS2 = 0; CHS0 = 0; CHS1 = 0; CHS2 = 0; ADFM = 1; PCFG0 = 0; PCFG1 = 0; PCFG2 = 0; PCFG3 = 0; ADON = 1; }</text:p>
      <text:p text:style-name="Text_20_body">unsigned short read_adc(unsigned char channel) { ADCON0 = (ADCON0 &amp; 0xC7U) | ((unsigned char)(channel &lt;&lt; 3)); GO = 1; while (nDONE); return (unsigned short)((ADRESH &lt;&lt; 8) | ADRESL); }/** * @file dashboard.c * @author krubro * @date 2026-05-09 * @brief Dashboard — update (hardware reads + state) and render (LCD writes). <text:span text:style-name="T1"> </text:span> Design rule enforced here: * dashboard_update() owns hardware access and sys mutation. Zero LCD writes. * dashboard_render() owns LCD writes. Zero hardware reads, zero sys mutation. * main.c calls them in order: update → render. */</text:p>
      <text:p text:style-name="Text_20_body">#include “main_config.h”</text:p>
      <text:p text:style-name="Text_20_body">static const char * const gear_labels[] = {“GR”, “GN”, “G1”, “G2”, “G3”, “G4”};</text:p>
      <text:p text:style-name="Text_20_body">static unsigned char prev_speed = 0xFFU; /* Cache — 0xFF = uninitialized */ static unsigned char prev_gear_render = 0xFFU; static unsigned char prev_flags_render = 0xFFU;</text:p>
      <text:p text:style-name="Text_20_body">void invalidate_dashboard_cache(void) { prev_speed = 0xFFU; prev_gear_render = 0xFFU; prev_flags_render = 0xFFU; }</text:p>
      <text:p text:style-name="Text_20_body">/* ========================================================================= * UPDATE — reads hardware, mutates sys. No LCD. * ========================================================================= */</text:p>
      <text:p text:style-name="Text_20_body">void dashboard_update(EVENT evt) { static unsigned char prev_flags_uart = 0; static GEAR_STATE prev_gear_uart = GR;</text:p>
      <text:p text:style-name="P18">/* Read time from RTC — always fresh. */</text:p>
      <text:p text:style-name="P19">sys.seconds = ds1307_i2c_read(SEC_ADDRESS);</text:p>
      <text:p text:style-name="P20">sys.minutes = ds1307_i2c_read(MIN_ADDRESS);</text:p>
      <text:p text:style-name="P21">sys.hours <text:s text:c="2"/>= ds1307_i2c_read(HOUR_ADDRESS);</text:p>
      <text:p text:style-name="P22"/>
      <text:p text:style-name="P23">/* Read speed from ADC — always fresh. */</text:p>
      <text:p text:style-name="P24">sys.speed = (unsigned char)((unsigned long)read_adc(CHANNEL0) * 100UL / 1023UL);</text:p>
      <text:p text:style-name="P25"/>
      <text:p text:style-name="P26">/* Process gear and crash events — only while not crashed. */</text:p>
      <text:p text:style-name="P27">if (!(sys.flags &amp; FLAG_CRASH))</text:p>
      <text:p text:style-name="P28">{</text:p>
      <text:p text:style-name="P29"><text:s text:c="4"/>if (evt == EVENT_SW1)</text:p>
      <text:p text:style-name="P30"><text:s text:c="4"/>{</text:p>
      <text:p text:style-name="P31"><text:s text:c="8"/>sys.flags |= FLAG_IGNITION_ON | FLAG_CRASH;</text:p>
      <text:p text:style-name="P32"><text:s text:c="8"/>sys.log_pending = 1;</text:p>
      <text:p text:style-name="P33"><text:s text:c="4"/>}</text:p>
      <text:p text:style-name="P34"><text:s text:c="4"/>else if (evt == EVENT_SW2 &amp;&amp; sys.gear &lt; G4)</text:p>
      <text:p text:style-name="P35"><text:s text:c="4"/>{</text:p>
      <text:p text:style-name="P36"><text:s text:c="8"/>sys.gear++;</text:p>
      <text:p text:style-name="P37"><text:s text:c="8"/>sys.flags |= FLAG_IGNITION_ON;</text:p>
      <text:p text:style-name="P38"><text:s text:c="8"/>sys.log_pending = 1;</text:p>
      <text:p text:style-name="P39"><text:s text:c="4"/>}</text:p>
      <text:p text:style-name="P40"><text:s text:c="4"/>else if (evt == EVENT_SW3 &amp;&amp; sys.gear &gt; GR)</text:p>
      <text:p text:style-name="P41"><text:s text:c="4"/>{</text:p>
      <text:p text:style-name="P42"><text:s text:c="8"/>sys.gear--;</text:p>
      <text:p text:style-name="P43"><text:s text:c="8"/>sys.flags |= FLAG_IGNITION_ON;</text:p>
      <text:p text:style-name="P44"><text:s text:c="8"/>sys.log_pending = 1;</text:p>
      <text:p text:style-name="P45"><text:s text:c="4"/>}</text:p>
      <text:p text:style-name="P46">}</text:p>
      <text:p text:style-name="P47"/>
      <text:p text:style-name="P48">/* UART telemetry — only on change, not every cycle. */</text:p>
      <text:p text:style-name="P49">if ((sys.flags &amp; FLAG_CRASH) &amp;&amp; !(prev_flags_uart &amp; FLAG_CRASH))</text:p>
      <text:p text:style-name="P50">{</text:p>
      <text:p text:style-name="P51"><text:s text:c="4"/>uart_puts("[DASH] CRASH\n");</text:p>
      <text:p text:style-name="P52">}</text:p>
      <text:p text:style-name="P53">else if (sys.gear != prev_gear_uart)</text:p>
      <text:p text:style-name="P54">{</text:p>
      <text:p text:style-name="P55"><text:s text:c="4"/>uart_puts("[DASH] GEAR: ");</text:p>
      <text:p text:style-name="P56"><text:s text:c="4"/>uart_puts(gear_labels[sys.gear]);</text:p>
      <text:p text:style-name="P57"><text:s text:c="4"/>uart_puts("\n");</text:p>
      <text:p text:style-name="P58">}</text:p>
      <text:p text:style-name="P59">else if ((sys.flags &amp; FLAG_IGNITION_ON) &amp;&amp; !(prev_flags_uart &amp; FLAG_IGNITION_ON))</text:p>
      <text:p text:style-name="P60">{</text:p>
      <text:p text:style-name="P61"><text:s text:c="4"/>uart_puts("[DASH] IGNITION ON\n");</text:p>
      <text:p text:style-name="P62">}</text:p>
      <text:p text:style-name="P63"/>
      <text:p text:style-name="P64">prev_flags_uart = sys.flags;</text:p>
      <text:p text:style-name="P65">prev_gear_uart <text:s text:c="1"/>= sys.gear;</text:p>
      <text:p text:style-name="First_20_paragraph">}</text:p>
      <text:p text:style-name="Text_20_body">/* ========================================================================= * RENDER — reads sys, writes LCD. No hardware reads, no sys mutation. * ========================================================================= */</text:p>
      <text:p text:style-name="Text_20_body">void dashboard_render(void) { char time_buf[9]; unsigned char speed_buf[4];</text:p>
      <text:p text:style-name="P66">/* --- Time label (static text — drawn every frame, cheap) --- */</text:p>
      <text:p text:style-name="P67">clcd_print("TIME", LINE1(0));</text:p>
      <text:p text:style-name="P68"/>
      <text:p text:style-name="P69">/* --- Time value (unpack BCD from sys) --- */</text:p>
      <text:p text:style-name="P70">time_buf[0] = (char)(((sys.hours <text:s text:c="2"/>&gt;&gt; 4) &amp; 0x03U) + '0');</text:p>
      <text:p text:style-name="P71">time_buf[1] = (char)((sys.hours <text:s text:c="3"/>&amp; 0x0FU) + '0');</text:p>
      <text:p text:style-name="P72">time_buf[2] = ':';</text:p>
      <text:p text:style-name="P73">time_buf[3] = (char)(((sys.minutes &gt;&gt; 4) &amp; 0x07U) + '0');</text:p>
      <text:p text:style-name="P74">time_buf[4] = (char)((sys.minutes <text:s text:c="1"/>&amp; 0x0FU) + '0');</text:p>
      <text:p text:style-name="P75">time_buf[5] = ':';</text:p>
      <text:p text:style-name="P76">time_buf[6] = (char)(((sys.seconds &gt;&gt; 4) &amp; 0x07U) + '0');</text:p>
      <text:p text:style-name="P77">time_buf[7] = (char)((sys.seconds <text:s text:c="1"/>&amp; 0x0FU) + '0');</text:p>
      <text:p text:style-name="P78">time_buf[8] = '\0';</text:p>
      <text:p text:style-name="P79">clcd_print(time_buf, LINE2(0));</text:p>
      <text:p text:style-name="P80"/>
      <text:p text:style-name="P81">/* --- Event label (static text) --- */</text:p>
      <text:p text:style-name="P82">clcd_print("EV", LINE1(10));</text:p>
      <text:p text:style-name="P83"/>
      <text:p text:style-name="P84">/* --- Gear/crash (redraw only when changed) --- */</text:p>
      <text:p text:style-name="P85">if (sys.gear != prev_gear_render || sys.flags != prev_flags_render)</text:p>
      <text:p text:style-name="P86">{</text:p>
      <text:p text:style-name="P87"><text:s text:c="4"/>prev_gear_render <text:s text:c="1"/>= sys.gear;</text:p>
      <text:p text:style-name="P88"><text:s text:c="4"/>prev_flags_render = sys.flags;</text:p>
      <text:p text:style-name="P89"/>
      <text:p text:style-name="P90"><text:s text:c="4"/>if (sys.flags &amp; FLAG_CRASH)</text:p>
      <text:p text:style-name="P91"><text:s text:c="8"/>clcd_print("C ", LINE2(10));</text:p>
      <text:p text:style-name="P92"><text:s text:c="4"/>else if (sys.flags &amp; FLAG_IGNITION_ON)</text:p>
      <text:p text:style-name="P93"><text:s text:c="8"/>clcd_print(gear_labels[sys.gear], LINE2(10));</text:p>
      <text:p text:style-name="P94"><text:s text:c="4"/>else</text:p>
      <text:p text:style-name="P95"><text:s text:c="8"/>clcd_print("ON", LINE2(10));</text:p>
      <text:p text:style-name="P96">}</text:p>
      <text:p text:style-name="P97"/>
      <text:p text:style-name="P98">/* --- Speed label (static) --- */</text:p>
      <text:p text:style-name="P99">clcd_print("SD", LINE1(13));</text:p>
      <text:p text:style-name="P100"/>
      <text:p text:style-name="P101">/* --- Speed value (redraw only when changed) --- */</text:p>
      <text:p text:style-name="P102">if (sys.speed != prev_speed)</text:p>
      <text:p text:style-name="P103">{</text:p>
      <text:p text:style-name="P104"><text:s text:c="4"/>prev_speed <text:s text:c="3"/>= sys.speed;</text:p>
      <text:p text:style-name="P105"><text:s text:c="4"/>speed_buf[0] <text:s text:c="1"/>= (unsigned char)((sys.speed / 100U) + '0');</text:p>
      <text:p text:style-name="P106"><text:s text:c="4"/>speed_buf[1] <text:s text:c="1"/>= (unsigned char)(((sys.speed / 10U) % 10U) + '0');</text:p>
      <text:p text:style-name="P107"><text:s text:c="4"/>speed_buf[2] <text:s text:c="1"/>= (unsigned char)((sys.speed % 10U) + '0');</text:p>
      <text:p text:style-name="P108"><text:s text:c="4"/>speed_buf[3] <text:s text:c="1"/>= '\0';</text:p>
      <text:p text:style-name="P109"><text:s text:c="4"/>clcd_print((const char *)speed_buf, LINE2(13));</text:p>
      <text:p text:style-name="P110">}</text:p>
      <text:p text:style-name="First_20_paragraph">}/** * @file eeprom.c * @brief AT24C02/AT24C04 circular log driver — 10-slot, 11-byte ASCII records. <text:span text:style-name="T1"> </text:span> Circular buffer rules: * - head = slot index (0–9) where the NEXT write will go. * - count = how many valid entries exist (0–10, never exceeds 10). * - When count == 10, the buffer is full. head keeps advancing and * silently overwrites the oldest slot — no special handling needed. * - Read order: oldest = slot[(head - count + 10) % 10], newest = slot[(head-1+10)%10] <text:span text:style-name="T1"> </text:span> Record encoding (“235959G3085”): * bytes 0-1 hours BCD → two ASCII digits * bytes 2-3 minutes BCD → two ASCII digits * bytes 4-5 seconds BCD → two ASCII digits * byte 6 literal ‘G’ * byte 7 gear digit: ‘0’=Reverse ‘1’=Neutral ‘2’–‘5’=G1–G4, ‘C’=crash * bytes 8-10 speed 0–100 → three ASCII digits */</text:p>
      <text:p text:style-name="Text_20_body">#include “main_config.h”</text:p>
      <text:p text:style-name="Text_20_body">/* ========================================================================= * Private — chip addressing * ========================================================================= */</text:p>
      <text:p text:style-name="Text_20_body">/* For AT24C04: bit 1 of the device address carries the 9th address bit (A8) */ static unsigned char get_device_addr(unsigned int addr, unsigned char base) { #if EEPROM_TYPE == 4 return (unsigned char)(base | (unsigned char)((addr &gt;&gt; 7) &amp; 0x02U)); #else return base; #endif }</text:p>
      <text:p text:style-name="Text_20_body">/* ========================================================================= * Private — ACK polling (waits for the EEPROM to finish an internal write) * ========================================================================= */</text:p>
      <text:p text:style-name="Text_20_body">static unsigned char ack_poll(unsigned char dev_addr) { unsigned char attempts = 0; while (attempts &lt; EEPROM_POLL_TIMEOUT) { i2c_start(); if (i2c_write(dev_addr)) { i2c_stop(); return 1; } i2c_stop(); attempts++; __delay_us(100); } return 0; }</text:p>
      <text:p text:style-name="Text_20_body">/* ========================================================================= * Public — low-level byte access * ========================================================================= */</text:p>
      <text:p text:style-name="Text_20_body">unsigned char eeprom_write_byte(unsigned int addr, unsigned char data) { unsigned char dev = get_device_addr(addr, EEPROM_WRITE_BASE); i2c_start(); i2c_write(dev); i2c_write((unsigned char)(addr &amp; 0xFFU)); i2c_write(data); i2c_stop(); return ack_poll(dev); }</text:p>
      <text:p text:style-name="Text_20_body">unsigned char eeprom_read_byte(unsigned int addr) { unsigned char data; unsigned char dev_w = get_device_addr(addr, EEPROM_WRITE_BASE); unsigned char dev_r = get_device_addr(addr, EEPROM_READ_BASE); i2c_start(); i2c_write(dev_w); i2c_write((unsigned char)(addr &amp; 0xFFU)); i2c_repeat_start(); i2c_write(dev_r); data = i2c_read(1); i2c_stop(); return data; }</text:p>
      <text:p text:style-name="Text_20_body">/* ========================================================================= * Private — header helpers (head and count live at bytes 0x00 and 0x01) * ========================================================================= */</text:p>
      <text:p text:style-name="Text_20_body">static unsigned char read_head(void) { return eeprom_read_byte(LOG_HEAD_ADDR); } static unsigned char read_count(void) { return eeprom_read_byte(LOG_COUNT_ADDR); }</text:p>
      <text:p text:style-name="Text_20_body">/* ========================================================================= * Private — record encoding <text:span text:style-name="T1"> </text:span> Packs a LOG_ENTRY into the 11-byte ASCII format and writes it to the * physical EEPROM address that corresponds to slot_index. <text:span text:style-name="T1"> </text:span> Slot address = LOG_DATA_START + (slot_index * LOG_RECORD_SIZE) * ========================================================================= */</text:p>
      <text:p text:style-name="Text_20_body">/* Converts a BCD byte (e.g. 0x23) into two ASCII chars (‘2’, ‘3’) <text:span text:style-name="T1">/ static void bcd_to_ascii(unsigned char bcd, char </text:span>hi, char <text:span text:style-name="T1">lo) { </text:span>hi = (char)(((bcd &gt;&gt; 4) &amp; 0x0FU) + ‘0’); *lo = (char)((bcd &amp; 0x0FU) + ‘0’); }</text:p>
      <text:p text:style-name="Text_20_body">/* Converts a 0–100 integer to three ASCII chars (‘0’–‘9’) <text:span text:style-name="T1">/ static void speed_to_ascii(unsigned char spd, char </text:span>h, char <text:span text:style-name="T1">t, char </text:span>u) { <text:span text:style-name="T1">h = (char)((spd / 100U) + </text:span>‘<text:span text:style-name="T1">0</text:span>’<text:span text:style-name="T1">); </text:span>t = (char)(((spd / 10U) % 10U) + ‘0’); *u = (char)((spd % 10U) + ‘0’); }</text:p>
      <text:p text:style-name="Text_20_body">static unsigned char write_slot(unsigned char slot_index, const LOG_ENTRY <text:span text:style-name="T1">entry) { char rec[LOG_RECORD_SIZE]; /</text:span> 11-byte record buffer — not null-terminated <text:span text:style-name="T1">/ unsigned int addr = LOG_DATA_START + ((unsigned int)slot_index </text:span> LOG_RECORD_SIZE);</text:p>
      <text:p text:style-name="P111">/* Pack the record */</text:p>
      <text:p text:style-name="P112">bcd_to_ascii(entry-&gt;hours, <text:s text:c="2"/>&amp;rec[0], &amp;rec[1]);</text:p>
      <text:p text:style-name="P113">bcd_to_ascii(entry-&gt;minutes, &amp;rec[2], &amp;rec[3]);</text:p>
      <text:p text:style-name="P114">bcd_to_ascii(entry-&gt;seconds, &amp;rec[4], &amp;rec[5]);</text:p>
      <text:p text:style-name="P115"/>
      <text:p text:style-name="P116">rec[6] = 'G';</text:p>
      <text:p text:style-name="P117">/* Gear character: crash overrides gear with 'C' */</text:p>
      <text:p text:style-name="P118">rec[7] = (entry-&gt;flags &amp; FLAG_CRASH)</text:p>
      <text:p text:style-name="P119"><text:s text:c="9"/>? 'C'</text:p>
      <text:p text:style-name="P120"><text:s text:c="9"/>: (char)('0' + (entry-&gt;gear &amp; 0x07U));</text:p>
      <text:p text:style-name="P121"/>
      <text:p text:style-name="P122">speed_to_ascii(entry-&gt;speed, &amp;rec[8], &amp;rec[9], &amp;rec[10]);</text:p>
      <text:p text:style-name="P123"/>
      <text:p text:style-name="P124">/* Write all 11 bytes — abort on first failure */</text:p>
      <text:p text:style-name="P125">unsigned char i;</text:p>
      <text:p text:style-name="P126">for (i = 0; i &lt; LOG_RECORD_SIZE; i++)</text:p>
      <text:p text:style-name="P127">{</text:p>
      <text:p text:style-name="P128"><text:s text:c="4"/>if (!eeprom_write_byte(addr + i, (unsigned char)rec[i]))</text:p>
      <text:p text:style-name="P129"><text:s text:c="8"/>return 0;</text:p>
      <text:p text:style-name="P130">}</text:p>
      <text:p text:style-name="P131">return 1;</text:p>
      <text:p text:style-name="First_20_paragraph">}</text:p>
      <text:p text:style-name="Text_20_body">/* ========================================================================= * Public — circular log API * ========================================================================= */</text:p>
      <text:p text:style-name="Text_20_body">/** * @brief Writes entry to slot[head], advances head, clamps count to 10. <text:span text:style-name="T1"> </text:span> Example — buffer full (count=10), head=3: * Write to slot 3 (overwrites oldest). * head becomes 4. count stays 10. <text:span text:style-name="T1"> </text:span> Example — buffer not full (count=5), head=5: * Write to slot 5. * head becomes 6. count becomes 6. <text:span text:style-name="T1">/ unsigned char eeprom_write_log(const LOG_ENTRY </text:span>entry) { unsigned char head = read_head(); unsigned char count = read_count();</text:p>
      <text:p text:style-name="P132">/* Clamp head in case EEPROM was never initialised (0xFF default) */</text:p>
      <text:p text:style-name="P133">if (head &gt;= LOG_MAX_ENTRIES) head = 0;</text:p>
      <text:p text:style-name="P134"/>
      <text:p text:style-name="P135">if (!write_slot(head, entry)) return 0;</text:p>
      <text:p text:style-name="P136"/>
      <text:p text:style-name="P137">/* Advance head with wrap-around */</text:p>
      <text:p text:style-name="P138">head = (unsigned char)((head + 1U) % LOG_MAX_ENTRIES);</text:p>
      <text:p text:style-name="P139"/>
      <text:p text:style-name="P140">/* Count climbs to 10 and then stays there */</text:p>
      <text:p text:style-name="P141">if (count &lt; LOG_MAX_ENTRIES) count++;</text:p>
      <text:p text:style-name="P142"/>
      <text:p text:style-name="P143">if (!eeprom_write_byte(LOG_HEAD_ADDR, <text:s text:c="1"/>head)) <text:s text:c="1"/>return 0;</text:p>
      <text:p text:style-name="P144">if (!eeprom_write_byte(LOG_COUNT_ADDR, count)) return 0;</text:p>
      <text:p text:style-name="P145">return 1;</text:p>
      <text:p text:style-name="First_20_paragraph">}</text:p>
      <text:p text:style-name="Text_20_body">/** * @brief Reads logical entry at <text:span text:style-name="Source_Text">index</text:span> into a null-terminated 12-byte string. <text:span text:style-name="T1"> </text:span> index=0 → oldest entry index=count-1 → newest entry <text:span text:style-name="T1"> </text:span> Physical slot mapping: * oldest_slot = (head - count + 10) % 10 * physical = (oldest_slot + index) % 10 <text:span text:style-name="T1">/ void eeprom_read_log(unsigned char index, char </text:span>buf) { unsigned char head = read_head(); unsigned char count = read_count(); unsigned char i;</text:p>
      <text:p text:style-name="P146">if (head <text:s text:c="1"/>&gt;= LOG_MAX_ENTRIES) head <text:s text:c="1"/>= 0;</text:p>
      <text:p text:style-name="P147">if (count &gt; <text:s text:c="1"/>LOG_MAX_ENTRIES) count = LOG_MAX_ENTRIES;</text:p>
      <text:p text:style-name="P148"/>
      <text:p text:style-name="P149">/* Map logical index to physical slot */</text:p>
      <text:p text:style-name="P150">unsigned char oldest = (unsigned char)((head - count + LOG_MAX_ENTRIES) % LOG_MAX_ENTRIES);</text:p>
      <text:p text:style-name="P151">unsigned char slot <text:s text:c="2"/>= (unsigned char)((oldest + index) % LOG_MAX_ENTRIES);</text:p>
      <text:p text:style-name="P152">unsigned int <text:s text:c="1"/>addr <text:s text:c="2"/>= LOG_DATA_START + ((unsigned int)slot * LOG_RECORD_SIZE);</text:p>
      <text:p text:style-name="P153"/>
      <text:p text:style-name="P154">/* Read 11 bytes then null-terminate */</text:p>
      <text:p text:style-name="P155">for (i = 0; i &lt; LOG_RECORD_SIZE; i++)</text:p>
      <text:p text:style-name="P156"><text:s text:c="4"/>buf[i] = (char)eeprom_read_byte(addr + i);</text:p>
      <text:p text:style-name="P157">buf[LOG_RECORD_SIZE] = '\0';</text:p>
      <text:p text:style-name="First_20_paragraph">}</text:p>
      <text:p text:style-name="Text_20_body">unsigned char eeprom_get_entry_count(void) { unsigned char count = read_count(); return (count &gt; LOG_MAX_ENTRIES) ? LOG_MAX_ENTRIES : count; }</text:p>
      <text:p text:style-name="Text_20_body">unsigned char eeprom_clear_log(void) { if (!eeprom_write_byte(LOG_HEAD_ADDR, 0U)) return 0; if (!eeprom_write_byte(LOG_COUNT_ADDR, 0U)) return 0; return 1; }/** * @file events.c * @author krubro * @date 2026-05-09 * @brief translate_key() — the single point where hardware meets application. */</text:p>
      <text:p text:style-name="Text_20_body">#include “main_config.h”</text:p>
      <text:p text:style-name="Text_20_body">EVENT translate_key(unsigned char key) { switch (key) { case SW1: return EVENT_SW1; case SW2: return EVENT_SW2; case SW3: return EVENT_SW3; case SW4: return EVENT_SW4; case SW5: return EVENT_SW5; case SW6: return EVENT_SW6; default: return EVENT_NONE; } }/** * @file login.c * @author krubro * @date 2026-05-09 * @brief 4-digit PIN login — progressive lockout, logout flag, update/render split. <text:span text:style-name="T1"> </text:span> Password storage: * my_pass[] lives in RAM (not const ROM). It is loaded from EEPROM at boot * via login_load_password(). If EEPROM is unprogrammed (all bytes 0xFF), * the factory default “1111” is written to EEPROM and used. * login_set_password() lets set_password.c update the live PIN immediately * after a successful change, without a reboot. <text:span text:style-name="T1"> </text:span> Phases: * PHASE_ENTERING — waiting for 4 digits * PHASE_FAIL — wrong PIN — render shows feedback, then → LOCKOUT * PHASE_LOCKOUT — timed cooldown before next attempt (countdown on CLCD) * PHASE_SUCCESS — correct PIN — render grants access, → MENU * PHASE_LOCKED — all 5 attempts exhausted — permanent, Contact Admin <text:span text:style-name="T1"> </text:span> Timing: * Cursor blink : BLINK_THRESHOLD * ~10 ms = ~200 ms (Timer0) * Idle timeout : TIMEOUT_THRESHOLD * ~100 ms = 5 s (Timer1) * Cooldown : COOLDOWN_TICKS blink ticks = ~200 ms (Timer0, input-independent) * Lockout clock : timeout_tick / 10 = seconds elapsed (10 ticks × 100 ms = 1 s) */</text:p>
      <text:p text:style-name="Text_20_body">#include “main_config.h”</text:p>
      <text:p text:style-name="Text_20_body">#define BLINK_THRESHOLD 20U // ~200 ms per blink toggle #define TIMEOUT_THRESHOLD 50U // 50 × 100 ms = 5 s idle timeout #define COOLDOWN_TICKS 2U // 2 blink ticks = ~200 ms entry guard</text:p>
      <text:p text:style-name="Text_20_body">typedef enum { PHASE_ENTERING, PHASE_FAIL, PHASE_LOCKOUT, PHASE_SUCCESS, PHASE_LOCKED } LOGIN_PHASE;</text:p>
      <text:p text:style-name="Text_20_body">static const unsigned char lockout_durations[MAX_FAILS - 1U] = {0U, 15U, 30U, 60U}; static const unsigned char default_pass[PASS_LENGTH] = {‘1’,‘1’,‘1’,‘1’};</text:p>
      <text:p text:style-name="Text_20_body">// RAM copy — loaded from EEPROM at boot, updated live by login_set_password() static unsigned char my_pass[PASS_LENGTH];</text:p>
      <text:p text:style-name="Text_20_body">static LOGIN_PHASE phase = PHASE_ENTERING; static unsigned char fail_count = 0; // Persists across resets static unsigned char digit_count = 0; static unsigned char entered[PASS_LENGTH + 1U]; static unsigned char cursor_visible = 0; static unsigned char screen_ready = 0; static unsigned char cooldown_ticks = 0; static unsigned char lockout_secs_remaining = 0; static unsigned char logged_in_flag = 0;</text:p>
      <text:p text:style-name="Text_20_body">/* ========================================================================= * Password persistence — EEPROM load and live update * ========================================================================= */</text:p>
      <text:p text:style-name="Text_20_body">/** * @brief Loads the 4-byte PIN from EEPROM_PASS_ADDR into my_pass[]. * Falls back to the factory default if EEPROM is unprogrammed (0xFF bytes). * Call once in init_config() before the main loop. */ void login_load_password(void) { unsigned char k; unsigned char all_ff = 1;</text:p>
      <text:p text:style-name="P158">for (k = 0; k &lt; PASS_LENGTH; k++)</text:p>
      <text:p text:style-name="P159">{</text:p>
      <text:p text:style-name="P160"><text:s text:c="4"/>my_pass[k] = eeprom_read_byte((unsigned int)(EEPROM_PASS_ADDR + k));</text:p>
      <text:p text:style-name="P161"><text:s text:c="4"/>if (my_pass[k] != 0xFFU) all_ff = 0;</text:p>
      <text:p text:style-name="P162">}</text:p>
      <text:p text:style-name="P163"/>
      <text:p text:style-name="P164">if (all_ff)</text:p>
      <text:p text:style-name="P165">{</text:p>
      <text:p text:style-name="P166"><text:s text:c="4"/>// EEPROM is unprogrammed — write the factory default and use it</text:p>
      <text:p text:style-name="P167"><text:s text:c="4"/>uart_puts("[LOGIN] No saved pass — writing default\r\n");</text:p>
      <text:p text:style-name="P168"><text:s text:c="4"/>for (k = 0; k &lt; PASS_LENGTH; k++)</text:p>
      <text:p text:style-name="P169"><text:s text:c="4"/>{</text:p>
      <text:p text:style-name="P170"><text:s text:c="8"/>my_pass[k] = default_pass[k];</text:p>
      <text:p text:style-name="P171"><text:s text:c="8"/>eeprom_write_byte((unsigned int)(EEPROM_PASS_ADDR + k), default_pass[k]);</text:p>
      <text:p text:style-name="P172"><text:s text:c="4"/>}</text:p>
      <text:p text:style-name="P173">}</text:p>
      <text:p text:style-name="P174">else</text:p>
      <text:p text:style-name="P175">{</text:p>
      <text:p text:style-name="P176"><text:s text:c="4"/>uart_puts("[LOGIN] Password loaded from EEPROM\r\n");</text:p>
      <text:p text:style-name="P177">}</text:p>
      <text:p text:style-name="First_20_paragraph">}</text:p>
      <text:p text:style-name="Text_20_body">/** * @brief Updates the live PIN in RAM from new_pass[PASS_LENGTH]. * Called by set_password_render() after a successful change. * The EEPROM write is done by set_password — this only updates RAM. <text:span text:style-name="T1">/ void login_set_password(const unsigned char </text:span>new_pass) { unsigned char k; for (k = 0; k &lt; PASS_LENGTH; k++) my_pass[k] = new_pass[k]; }</text:p>
      <text:p text:style-name="Text_20_body">/* ========================================================================= * Auth accessors * ========================================================================= */</text:p>
      <text:p text:style-name="Text_20_body">unsigned char is_logged_in(void) { return logged_in_flag; }</text:p>
      <text:p text:style-name="Text_20_body">void do_logout(void) { logged_in_flag = 0; uart_puts(“[LOGIN] LOGGED OUT”); }</text:p>
      <text:p text:style-name="Text_20_body">/* ========================================================================= * Private helpers * ========================================================================= */</text:p>
      <text:p text:style-name="Text_20_body">static int pass_match(void) { unsigned char k; for (k = 0; k &lt; PASS_LENGTH; k++) if (entered[k] != my_pass[k]) return 0; return 1; }</text:p>
      <text:p text:style-name="Text_20_body">/* ========================================================================= * login_reset — call once on transition INTO LOGIN state * ========================================================================= */</text:p>
      <text:p text:style-name="Text_20_body">void login_reset(void) { digit_count = 0; cursor_visible = 0; screen_ready = 0; cooldown_ticks = 0; // Counts up via blink ticks — independent of keypresses phase = (fail_count &gt;= MAX_FAILS) ? PHASE_LOCKED : PHASE_ENTERING; reset_blink_tick(); reset_timeout_tick(); }</text:p>
      <text:p text:style-name="Text_20_body">/* ========================================================================= * UPDATE — advances phase from timer ticks and events. Zero LCD writes. * ========================================================================= */</text:p>
      <text:p text:style-name="Text_20_body">void login_update(EVENT evt) { if (phase == PHASE_LOCKED || phase == PHASE_SUCCESS) return;</text:p>
      <text:p text:style-name="P178">// Timer0: cursor blink and entry cooldown counter</text:p>
      <text:p text:style-name="P179">if (blink_tick &gt;= BLINK_THRESHOLD)</text:p>
      <text:p text:style-name="P180">{</text:p>
      <text:p text:style-name="P181"><text:s text:c="4"/>reset_blink_tick();</text:p>
      <text:p text:style-name="P182"><text:s text:c="4"/>cursor_visible = !cursor_visible;</text:p>
      <text:p text:style-name="P183"><text:s text:c="4"/>if (cooldown_ticks &lt; COOLDOWN_TICKS) cooldown_ticks++;</text:p>
      <text:p text:style-name="P184">}</text:p>
      <text:p text:style-name="P185"/>
      <text:p text:style-name="P186">// Lockout countdown — uses timeout_tick / 10 as a seconds counter</text:p>
      <text:p text:style-name="P187">if (phase == PHASE_LOCKOUT)</text:p>
      <text:p text:style-name="P188">{</text:p>
      <text:p text:style-name="P189"><text:s text:c="4"/>unsigned char elapsed = (unsigned char)(timeout_tick / 10U);</text:p>
      <text:p text:style-name="P190"><text:s text:c="4"/>unsigned char dur <text:s text:c="4"/>= lockout_durations[fail_count - 1U];</text:p>
      <text:p text:style-name="P191"/>
      <text:p text:style-name="P192"><text:s text:c="4"/>lockout_secs_remaining = (elapsed &lt; dur) ? (unsigned char)(dur - elapsed) : 0U;</text:p>
      <text:p text:style-name="P193"/>
      <text:p text:style-name="P194"><text:s text:c="4"/>if (lockout_secs_remaining == 0U)</text:p>
      <text:p text:style-name="P195"><text:s text:c="4"/>{</text:p>
      <text:p text:style-name="P196"><text:s text:c="8"/>uart_puts("[LOGIN] LOCKOUT EXPIRED\r\n");</text:p>
      <text:p text:style-name="P197"><text:s text:c="8"/>phase <text:s text:c="9"/>= PHASE_ENTERING;</text:p>
      <text:p text:style-name="P198"><text:s text:c="8"/>screen_ready <text:s text:c="2"/>= 0;</text:p>
      <text:p text:style-name="P199"><text:s text:c="8"/>cooldown_ticks = COOLDOWN_TICKS; <text:s text:c="3"/>// Skip cooldown — user already waited</text:p>
      <text:p text:style-name="P200"><text:s text:c="8"/>reset_blink_tick();</text:p>
      <text:p text:style-name="P201"><text:s text:c="8"/>reset_timeout_tick();</text:p>
      <text:p text:style-name="P202"><text:s text:c="4"/>}</text:p>
      <text:p text:style-name="P203"><text:s text:c="4"/>return;</text:p>
      <text:p text:style-name="P204">}</text:p>
      <text:p text:style-name="P205"/>
      <text:p text:style-name="P206">// Idle timeout — only in PHASE_ENTERING</text:p>
      <text:p text:style-name="P207">if (evt == EVENT_NONE &amp;&amp; timeout_tick &gt;= TIMEOUT_THRESHOLD)</text:p>
      <text:p text:style-name="P208">{</text:p>
      <text:p text:style-name="P209"><text:s text:c="4"/>uart_puts("[LOGIN] TIMEOUT\r\n");</text:p>
      <text:p text:style-name="P210"><text:s text:c="4"/>reset_timeout_tick();</text:p>
      <text:p text:style-name="P211"><text:s text:c="4"/>login_reset();</text:p>
      <text:p text:style-name="P212"><text:s text:c="4"/>invalidate_dashboard_cache();</text:p>
      <text:p text:style-name="P213"><text:s text:c="4"/>set_status(DASHBOARD);</text:p>
      <text:p text:style-name="P214"><text:s text:c="4"/>return;</text:p>
      <text:p text:style-name="P215">}</text:p>
      <text:p text:style-name="P216"/>
      <text:p text:style-name="P217">// Block digit input for ~200 ms after state entry</text:p>
      <text:p text:style-name="P218">if (cooldown_ticks &lt; COOLDOWN_TICKS) return;</text:p>
      <text:p text:style-name="P219"/>
      <text:p text:style-name="P220">// Digit entry</text:p>
      <text:p text:style-name="P221">if (digit_count &lt; PASS_LENGTH &amp;&amp; (evt == EVENT_SW4 || evt == EVENT_SW5))</text:p>
      <text:p text:style-name="P222">{</text:p>
      <text:p text:style-name="P223"><text:s text:c="4"/>entered[digit_count] = (evt == EVENT_SW4) ? '0' : '1';</text:p>
      <text:p text:style-name="P224"><text:s text:c="4"/>digit_count++;</text:p>
      <text:p text:style-name="P225"><text:s text:c="4"/>reset_blink_tick();</text:p>
      <text:p text:style-name="P226"><text:s text:c="4"/>reset_timeout_tick();</text:p>
      <text:p text:style-name="P227"><text:s text:c="4"/>cursor_visible = 1;</text:p>
      <text:p text:style-name="P228"/>
      <text:p text:style-name="P229"><text:s text:c="4"/>uart_puts("[LOGIN] digit ");</text:p>
      <text:p text:style-name="P230"><text:s text:c="4"/>uart_putchar((char)('0' + digit_count));</text:p>
      <text:p text:style-name="P231"><text:s text:c="4"/>uart_puts("\r\n");</text:p>
      <text:p text:style-name="P232">}</text:p>
      <text:p text:style-name="P233"/>
      <text:p text:style-name="P234">// Verify on 4th digit</text:p>
      <text:p text:style-name="P235">if (digit_count == PASS_LENGTH)</text:p>
      <text:p text:style-name="P236">{</text:p>
      <text:p text:style-name="P237"><text:s text:c="4"/>if (pass_match())</text:p>
      <text:p text:style-name="P238"><text:s text:c="4"/>{</text:p>
      <text:p text:style-name="P239"><text:s text:c="8"/>uart_puts("[LOGIN] CORRECT\r\n");</text:p>
      <text:p text:style-name="P240"><text:s text:c="8"/>phase = PHASE_SUCCESS;</text:p>
      <text:p text:style-name="P241"><text:s text:c="4"/>}</text:p>
      <text:p text:style-name="P242"><text:s text:c="4"/>else</text:p>
      <text:p text:style-name="P243"><text:s text:c="4"/>{</text:p>
      <text:p text:style-name="P244"><text:s text:c="8"/>fail_count++;</text:p>
      <text:p text:style-name="P245"><text:s text:c="8"/>uart_puts("[LOGIN] FAIL ");</text:p>
      <text:p text:style-name="P246"><text:s text:c="8"/>uart_putchar((char)('0' + fail_count));</text:p>
      <text:p text:style-name="P247"><text:s text:c="8"/>uart_puts("/");</text:p>
      <text:p text:style-name="P248"><text:s text:c="8"/>uart_putchar((char)('0' + MAX_FAILS));</text:p>
      <text:p text:style-name="P249"><text:s text:c="8"/>uart_puts("\r\n");</text:p>
      <text:p text:style-name="P250"><text:s text:c="8"/>phase = PHASE_FAIL;</text:p>
      <text:p text:style-name="P251"><text:s text:c="4"/>}</text:p>
      <text:p text:style-name="P252">}</text:p>
      <text:p text:style-name="First_20_paragraph">}</text:p>
      <text:p text:style-name="Text_20_body">/* ========================================================================= * RENDER — writes LCD from phase. No hardware reads. * One-shot frames (FAIL, SUCCESS) advance the phase after display. * ========================================================================= */</text:p>
      <text:p text:style-name="Text_20_body">void login_render(void) { unsigned char k;</text:p>
      <text:p text:style-name="P253">// Permanent lock</text:p>
      <text:p text:style-name="P254">if (phase == PHASE_LOCKED)</text:p>
      <text:p text:style-name="P255">{</text:p>
      <text:p text:style-name="P256"><text:s text:c="4"/>clcd_print("Device Locked <text:s text:c="2"/>", LINE1(0));</text:p>
      <text:p text:style-name="P257"><text:s text:c="4"/>clcd_print("Contact Admin <text:s text:c="2"/>", LINE2(0));</text:p>
      <text:p text:style-name="P258"><text:s text:c="4"/>return;</text:p>
      <text:p text:style-name="P259">}</text:p>
      <text:p text:style-name="P260"/>
      <text:p text:style-name="P261">// Access granted</text:p>
      <text:p text:style-name="P262">if (phase == PHASE_SUCCESS)</text:p>
      <text:p text:style-name="P263">{</text:p>
      <text:p text:style-name="P264"><text:s text:c="4"/>clcd_clear();</text:p>
      <text:p text:style-name="P265"><text:s text:c="4"/>clcd_print("Correct Entry <text:s text:c="2"/>", LINE1(0));</text:p>
      <text:p text:style-name="P266"><text:s text:c="4"/>clcd_print("Access Granted <text:s text:c="1"/>", LINE2(0));</text:p>
      <text:p text:style-name="P267"><text:s text:c="4"/>__delay_ms(1000);</text:p>
      <text:p text:style-name="P268"><text:s text:c="4"/>uart_puts("[LOGIN] ACCESS GRANTED\r\n");</text:p>
      <text:p text:style-name="P269"><text:s text:c="4"/>logged_in_flag <text:s text:c="8"/>= 1;</text:p>
      <text:p text:style-name="P270"><text:s text:c="4"/>lockout_secs_remaining = lockout_durations[0];</text:p>
      <text:p text:style-name="P271"><text:s text:c="4"/>fail_count <text:s text:c="12"/>= 0;</text:p>
      <text:p text:style-name="P272"><text:s text:c="4"/>login_reset();</text:p>
      <text:p text:style-name="P273"><text:s text:c="4"/>set_status(MENU);</text:p>
      <text:p text:style-name="P274"><text:s text:c="4"/>return;</text:p>
      <text:p text:style-name="P275">}</text:p>
      <text:p text:style-name="P276"/>
      <text:p text:style-name="P277">// Wrong PIN feedback — fires once, then → LOCKOUT or LOCKED</text:p>
      <text:p text:style-name="P278">if (phase == PHASE_FAIL)</text:p>
      <text:p text:style-name="P279">{</text:p>
      <text:p text:style-name="P280"><text:s text:c="4"/>unsigned char tries_left = (unsigned char)(MAX_FAILS - fail_count);</text:p>
      <text:p text:style-name="P281"/>
      <text:p text:style-name="P282"><text:s text:c="4"/>clcd_clear();</text:p>
      <text:p text:style-name="P283"><text:s text:c="4"/>clcd_print("Invalid Entry <text:s text:c="2"/>", LINE1(0));</text:p>
      <text:p text:style-name="P284"/>
      <text:p text:style-name="P285"><text:s text:c="4"/>if (fail_count &gt;= MAX_FAILS)</text:p>
      <text:p text:style-name="P286"><text:s text:c="4"/>{</text:p>
      <text:p text:style-name="P287"><text:s text:c="8"/>clcd_print("Device Locked! <text:s text:c="1"/>", LINE2(0));</text:p>
      <text:p text:style-name="P288"><text:s text:c="8"/>__delay_ms(2000);</text:p>
      <text:p text:style-name="P289"><text:s text:c="8"/>phase = PHASE_LOCKED;</text:p>
      <text:p text:style-name="P290"><text:s text:c="4"/>}</text:p>
      <text:p text:style-name="P291"><text:s text:c="4"/>else</text:p>
      <text:p text:style-name="P292"><text:s text:c="4"/>{</text:p>
      <text:p text:style-name="P293"><text:s text:c="8"/>clcd_putch((char)('0' + tries_left), LINE2(0));</text:p>
      <text:p text:style-name="P294"><text:s text:c="8"/>clcd_print(" tries left <text:s text:c="4"/>", <text:s text:c="8"/>LINE2(1));</text:p>
      <text:p text:style-name="P295"><text:s text:c="8"/>__delay_ms(1500);</text:p>
      <text:p text:style-name="P296"/>
      <text:p text:style-name="P297"><text:s text:c="8"/>reset_timeout_tick(); <text:s text:c="18"/>// Lockout clock starts here</text:p>
      <text:p text:style-name="P298"><text:s text:c="8"/>lockout_secs_remaining = lockout_durations[fail_count - 1U];</text:p>
      <text:p text:style-name="P299"><text:s text:c="8"/>phase <text:s text:c="7"/>= PHASE_LOCKOUT;</text:p>
      <text:p text:style-name="P300"><text:s text:c="8"/>screen_ready = 0;</text:p>
      <text:p text:style-name="P301"><text:s text:c="8"/>digit_count <text:s text:c="1"/>= 0;</text:p>
      <text:p text:style-name="P302"><text:s text:c="4"/>}</text:p>
      <text:p text:style-name="P303"><text:s text:c="4"/>clcd_clear();</text:p>
      <text:p text:style-name="P304"><text:s text:c="4"/>return;</text:p>
      <text:p text:style-name="P305">}</text:p>
      <text:p text:style-name="P306"/>
      <text:p text:style-name="P307">// Timed lockout countdown</text:p>
      <text:p text:style-name="P308">if (phase == PHASE_LOCKOUT)</text:p>
      <text:p text:style-name="P309">{</text:p>
      <text:p text:style-name="P310"><text:s text:c="4"/>static unsigned char last_shown = 0xFFU; <text:s text:c="3"/>// Sentinel — forces first draw</text:p>
      <text:p text:style-name="P311"/>
      <text:p text:style-name="P312"><text:s text:c="4"/>if (!screen_ready)</text:p>
      <text:p text:style-name="P313"><text:s text:c="4"/>{</text:p>
      <text:p text:style-name="P314"><text:s text:c="8"/>clcd_clear();</text:p>
      <text:p text:style-name="P315"><text:s text:c="8"/>clcd_print(" <text:s text:c="1"/>Locked! <text:s text:c="6"/>", LINE1(0));</text:p>
      <text:p text:style-name="P316"><text:s text:c="8"/>screen_ready = 1;</text:p>
      <text:p text:style-name="P317"><text:s text:c="8"/>last_shown <text:s text:c="2"/>= 0xFFU;</text:p>
      <text:p text:style-name="P318"><text:s text:c="4"/>}</text:p>
      <text:p text:style-name="P319"/>
      <text:p text:style-name="P320"><text:s text:c="4"/>if (lockout_secs_remaining != last_shown) <text:s text:c="2"/>// Redraw only when seconds change</text:p>
      <text:p text:style-name="P321"><text:s text:c="4"/>{</text:p>
      <text:p text:style-name="P322"><text:s text:c="8"/>last_shown = lockout_secs_remaining;</text:p>
      <text:p text:style-name="P323"><text:s text:c="8"/>clcd_print("Retry in: ", <text:s text:c="43"/>LINE2(0));</text:p>
      <text:p text:style-name="P324"><text:s text:c="8"/>clcd_putch((char)(lockout_secs_remaining / 100U + '0'), <text:s text:c="12"/>LINE2(10));</text:p>
      <text:p text:style-name="P325"><text:s text:c="8"/>clcd_putch((char)((lockout_secs_remaining / 10U) % 10U + '0'), <text:s text:c="5"/>LINE2(11));</text:p>
      <text:p text:style-name="P326"><text:s text:c="8"/>clcd_putch((char)(lockout_secs_remaining % 10U + '0'), <text:s text:c="13"/>LINE2(12));</text:p>
      <text:p text:style-name="P327"><text:s text:c="8"/>clcd_putch('s', <text:s text:c="53"/>LINE2(13));</text:p>
      <text:p text:style-name="P328"><text:s text:c="8"/>clcd_print(" <text:s text:c="1"/>", <text:s text:c="52"/>LINE2(14));</text:p>
      <text:p text:style-name="P329"><text:s text:c="4"/>}</text:p>
      <text:p text:style-name="P330"><text:s text:c="4"/>return;</text:p>
      <text:p text:style-name="P331">}</text:p>
      <text:p text:style-name="P332"/>
      <text:p text:style-name="P333">// PHASE_ENTERING — password prompt, drawn once per entry</text:p>
      <text:p text:style-name="P334">if (!screen_ready)</text:p>
      <text:p text:style-name="P335">{</text:p>
      <text:p text:style-name="P336"><text:s text:c="4"/>clcd_clear();</text:p>
      <text:p text:style-name="P337"><text:s text:c="4"/>clcd_print("PassWord: <text:s text:c="6"/>", LINE1(0));</text:p>
      <text:p text:style-name="P338"><text:s text:c="4"/>for (k = 0; k &lt; PASS_LENGTH; k++) clcd_putch(' ', LINE2(k));</text:p>
      <text:p text:style-name="P339"><text:s text:c="4"/>screen_ready = 1;</text:p>
      <text:p text:style-name="P340">}</text:p>
      <text:p text:style-name="P341"/>
      <text:p text:style-name="P342">for (k = 0; k &lt; digit_count; k++) clcd_putch('*', LINE2(k));</text:p>
      <text:p text:style-name="P343"/>
      <text:p text:style-name="P344">if (digit_count &lt; PASS_LENGTH)</text:p>
      <text:p text:style-name="P345"><text:s text:c="4"/>clcd_putch(cursor_visible ? '_' : ' ', LINE2(digit_count));</text:p>
      <text:p text:style-name="First_20_paragraph">}/** * @file main.c * @author krubro * @date 2026-05-09 * @brief Application entry point — event-driven main loop. <text:span text:style-name="T1"> </text:span> Loop structure: * 1. READ INPUTS — hardware polled once; translated to one EVENT. * 2. UPDATE STATE — active screen’s _update(evt) modifies sys / module state. * 3. RENDER OUTPUTS — active screen’s _render() writes LCD from current state. * 4. HANDLE STORAGE — EEPROM write if dashboard_update() set sys.log_pending. <text:span text:style-name="T1"> </text:span> Stack depth (PIC16F877A, 8-level hardware limit): * main(1) → eeprom_write_log(2) → eeprom_write_byte(3) * → i2c_start(4) → i2c_wait_for_idle(5). * ISR adds 1 → max 6. Safe (limit is 8). */</text:p>
      <text:p text:style-name="Text_20_body">#include “main_config.h”</text:p>
      <text:p text:style-name="Text_20_body">// Single authoritative vehicle state — owned by main.c, written by dashboard_update() SYSTEM_STATE sys = {0};</text:p>
      <text:p text:style-name="Text_20_body">static void init_config(void) { init_clcd(); init_digital_keypad(); initUART(9600UL); initI2C(100000UL); init_rtc(); initADC(); init_timers(); login_load_password(); // Load PIN from EEPROM before the main loop }</text:p>
      <text:p text:style-name="Text_20_body">static void log_entry_from_sys(LOG_ENTRY *e) { e-&gt;hours = sys.hours; e-&gt;minutes = sys.minutes; e-&gt;seconds = sys.seconds; e-&gt;speed = sys.speed; e-&gt;gear = (unsigned char)sys.gear; e-&gt;flags = sys.flags; }</text:p>
      <text:p text:style-name="Text_20_body">void main(void) { EVENT evt; LOG_ENTRY pending_entry;</text:p>
      <text:p text:style-name="P346">init_config();</text:p>
      <text:p text:style-name="P347"/>
      <text:p text:style-name="P348">uart_puts("=== CAR BLACK BOX STARTED ===\r\n");</text:p>
      <text:p text:style-name="P349">uart_puts("[STATE] DASHBOARD\r\n");</text:p>
      <text:p text:style-name="P350"/>
      <text:p text:style-name="P351">while (1)</text:p>
      <text:p text:style-name="P352">{</text:p>
      <text:p text:style-name="P353"><text:s text:c="4"/>/* ---- 1. READ INPUTS -------------------------------------------- */</text:p>
      <text:p text:style-name="P354"><text:s text:c="4"/>evt = translate_key(read_digital_keypad(EDGE));</text:p>
      <text:p text:style-name="P355"/>
      <text:p text:style-name="P356"><text:s text:c="4"/>/* ---- 2. UPDATE STATE -------------------------------------------- */</text:p>
      <text:p text:style-name="P357"><text:s text:c="4"/>switch (get_status())</text:p>
      <text:p text:style-name="P358"><text:s text:c="4"/>{</text:p>
      <text:p text:style-name="P359"><text:s text:c="4"/>case DASHBOARD:</text:p>
      <text:p text:style-name="P360"><text:s text:c="8"/>if (evt == EVENT_SW4)</text:p>
      <text:p text:style-name="P361"><text:s text:c="8"/>{</text:p>
      <text:p text:style-name="P362"><text:s text:c="12"/>if (is_logged_in())</text:p>
      <text:p text:style-name="P363"><text:s text:c="12"/>{</text:p>
      <text:p text:style-name="P364"><text:s text:c="16"/>menu_reset();</text:p>
      <text:p text:style-name="P365"><text:s text:c="16"/>set_status(MENU);</text:p>
      <text:p text:style-name="P366"><text:s text:c="12"/>}</text:p>
      <text:p text:style-name="P367"><text:s text:c="12"/>else</text:p>
      <text:p text:style-name="P368"><text:s text:c="12"/>{</text:p>
      <text:p text:style-name="P369"><text:s text:c="16"/>login_reset();</text:p>
      <text:p text:style-name="P370"><text:s text:c="16"/>set_status(LOGIN);</text:p>
      <text:p text:style-name="P371"><text:s text:c="12"/>}</text:p>
      <text:p text:style-name="P372"><text:s text:c="12"/>evt = EVENT_NONE;</text:p>
      <text:p text:style-name="P373"><text:s text:c="8"/>}</text:p>
      <text:p text:style-name="P374"><text:s text:c="8"/>else</text:p>
      <text:p text:style-name="P375"><text:s text:c="8"/>{</text:p>
      <text:p text:style-name="P376"><text:s text:c="12"/>dashboard_update(evt);</text:p>
      <text:p text:style-name="P377"><text:s text:c="8"/>}</text:p>
      <text:p text:style-name="P378"><text:s text:c="8"/>break;</text:p>
      <text:p text:style-name="P379"/>
      <text:p text:style-name="P380"><text:s text:c="4"/>case LOGIN:</text:p>
      <text:p text:style-name="P381"><text:s text:c="8"/>if (evt == EVENT_SW1)</text:p>
      <text:p text:style-name="P382"><text:s text:c="8"/>{</text:p>
      <text:p text:style-name="P383"><text:s text:c="12"/>uart_puts("[LOGIN] CANCELLED\r\n");</text:p>
      <text:p text:style-name="P384"><text:s text:c="12"/>login_reset();</text:p>
      <text:p text:style-name="P385"><text:s text:c="12"/>invalidate_dashboard_cache();</text:p>
      <text:p text:style-name="P386"><text:s text:c="12"/>set_status(DASHBOARD);</text:p>
      <text:p text:style-name="P387"><text:s text:c="12"/>evt = EVENT_NONE;</text:p>
      <text:p text:style-name="P388"><text:s text:c="8"/>}</text:p>
      <text:p text:style-name="P389"><text:s text:c="8"/>else</text:p>
      <text:p text:style-name="P390"><text:s text:c="8"/>{</text:p>
      <text:p text:style-name="P391"><text:s text:c="12"/>login_update(evt);</text:p>
      <text:p text:style-name="P392"><text:s text:c="8"/>}</text:p>
      <text:p text:style-name="P393"><text:s text:c="8"/>break;</text:p>
      <text:p text:style-name="P394"/>
      <text:p text:style-name="P395"><text:s text:c="4"/>case MENU:</text:p>
      <text:p text:style-name="P396"><text:s text:c="8"/>menu_update(evt);</text:p>
      <text:p text:style-name="P397"><text:s text:c="8"/>break;</text:p>
      <text:p text:style-name="P398"/>
      <text:p text:style-name="P399"><text:s text:c="4"/>case VIEW_LOGS:</text:p>
      <text:p text:style-name="P400"><text:s text:c="8"/>view_logs_update(evt);</text:p>
      <text:p text:style-name="P401"><text:s text:c="8"/>break;</text:p>
      <text:p text:style-name="P402"/>
      <text:p text:style-name="P403"><text:s text:c="4"/>case CHANGE_PASSWORD:</text:p>
      <text:p text:style-name="P404"><text:s text:c="8"/>set_password_update(evt);</text:p>
      <text:p text:style-name="P405"><text:s text:c="8"/>break;</text:p>
      <text:p text:style-name="P406"/>
      <text:p text:style-name="P407"><text:s text:c="4"/>case SET_TIME:</text:p>
      <text:p text:style-name="P408"><text:s text:c="8"/>set_time_update(evt);</text:p>
      <text:p text:style-name="P409"><text:s text:c="8"/>break;</text:p>
      <text:p text:style-name="P410"/>
      <text:p text:style-name="P411"><text:s text:c="4"/>case CLEAR_LOGS:</text:p>
      <text:p text:style-name="P412"><text:s text:c="4"/>case DOWNLOAD_LOGS:</text:p>
      <text:p text:style-name="P413"><text:s text:c="8"/>break; // One-shot — handled in render phase</text:p>
      <text:p text:style-name="P414"><text:s text:c="4"/>}</text:p>
      <text:p text:style-name="P415"/>
      <text:p text:style-name="P416"><text:s text:c="4"/>/* ---- 3. RENDER OUTPUTS ------------------------------------------ */</text:p>
      <text:p text:style-name="P417"><text:s text:c="4"/>switch (get_status())</text:p>
      <text:p text:style-name="P418"><text:s text:c="4"/>{</text:p>
      <text:p text:style-name="P419"><text:s text:c="4"/>case DASHBOARD:</text:p>
      <text:p text:style-name="P420"><text:s text:c="8"/>dashboard_render();</text:p>
      <text:p text:style-name="P421"><text:s text:c="8"/>break;</text:p>
      <text:p text:style-name="P422"/>
      <text:p text:style-name="P423"><text:s text:c="4"/>case LOGIN:</text:p>
      <text:p text:style-name="P424"><text:s text:c="8"/>login_render();</text:p>
      <text:p text:style-name="P425"><text:s text:c="8"/>break;</text:p>
      <text:p text:style-name="P426"/>
      <text:p text:style-name="P427"><text:s text:c="4"/>case MENU:</text:p>
      <text:p text:style-name="P428"><text:s text:c="8"/>menu_render();</text:p>
      <text:p text:style-name="P429"><text:s text:c="8"/>break;</text:p>
      <text:p text:style-name="P430"/>
      <text:p text:style-name="P431"><text:s text:c="4"/>case VIEW_LOGS:</text:p>
      <text:p text:style-name="P432"><text:s text:c="8"/>view_logs_render();</text:p>
      <text:p text:style-name="P433"><text:s text:c="8"/>break;</text:p>
      <text:p text:style-name="P434"/>
      <text:p text:style-name="P435"><text:s text:c="4"/>case CHANGE_PASSWORD:</text:p>
      <text:p text:style-name="P436"><text:s text:c="8"/>set_password_render();</text:p>
      <text:p text:style-name="P437"><text:s text:c="8"/>break;</text:p>
      <text:p text:style-name="P438"/>
      <text:p text:style-name="P439"><text:s text:c="4"/>case SET_TIME:</text:p>
      <text:p text:style-name="P440"><text:s text:c="8"/>set_time_render();</text:p>
      <text:p text:style-name="P441"><text:s text:c="8"/>break;</text:p>
      <text:p text:style-name="P442"/>
      <text:p text:style-name="P443"><text:s text:c="4"/>case CLEAR_LOGS:</text:p>
      <text:p text:style-name="P444"><text:s text:c="8"/>clear_logs();</text:p>
      <text:p text:style-name="P445"><text:s text:c="8"/>menu_reset();</text:p>
      <text:p text:style-name="P446"><text:s text:c="8"/>set_status(MENU);</text:p>
      <text:p text:style-name="P447"><text:s text:c="8"/>break;</text:p>
      <text:p text:style-name="P448"/>
      <text:p text:style-name="P449"><text:s text:c="4"/>case DOWNLOAD_LOGS:</text:p>
      <text:p text:style-name="P450"><text:s text:c="8"/>download_logs(); // Runs once, auto-transitions inside</text:p>
      <text:p text:style-name="P451"><text:s text:c="8"/>break;</text:p>
      <text:p text:style-name="P452"><text:s text:c="4"/>}</text:p>
      <text:p text:style-name="P453"/>
      <text:p text:style-name="P454"><text:s text:c="4"/>/* ---- 4. HANDLE STORAGE ------------------------------------------ */</text:p>
      <text:p text:style-name="P455"><text:s text:c="4"/>if (sys.log_pending)</text:p>
      <text:p text:style-name="P456"><text:s text:c="4"/>{</text:p>
      <text:p text:style-name="P457"><text:s text:c="8"/>sys.log_pending = 0;</text:p>
      <text:p text:style-name="P458"><text:s text:c="8"/>log_entry_from_sys(&amp;pending_entry);</text:p>
      <text:p text:style-name="P459"><text:s text:c="8"/>if (eeprom_write_log(&amp;pending_entry))</text:p>
      <text:p text:style-name="P460"><text:s text:c="12"/>uart_puts("[LOG] EEPROM OK\r\n");</text:p>
      <text:p text:style-name="P461"><text:s text:c="8"/>else</text:p>
      <text:p text:style-name="P462"><text:s text:c="12"/>uart_puts("[LOG] EEPROM FAIL\r\n");</text:p>
      <text:p text:style-name="P463"><text:s text:c="4"/>}</text:p>
      <text:p text:style-name="P464">}</text:p>
      <text:p text:style-name="First_20_paragraph">}/** * @file menu.c * @author krubro * @date 2026-05-09 * @brief Scrollable menu — update/render split, LOGOUT item, inactivity timeout. <text:span text:style-name="T1"> </text:span> Items: * 0 VIEW LOG → VIEW_LOGS state * 1 CLEAR LOG → CLEAR_LOGS state * 2 DOWNLOAD LOG → DOWNLOAD_LOGS state * 3 SET TIME → SET_TIME state * 4 CHANGE PASSWORD → CHANGE_PASSWORD state * 5 LOGOUT → do_logout() + DASHBOARD (no state entry for logout) <text:span text:style-name="T1"> </text:span> Inactivity: * 30 seconds (300 Timer1 ticks) of no input → auto-logout → DASHBOARD. * timeout_tick is reset on state entry (menu_reset) and on every keypress. <text:span text:style-name="T1"> </text:span> Render: * Redraws only when selection changes (last_drawn sentinel). * Padded 15-char strings overwrite previous content — no clcd_clear() needed. */</text:p>
      <text:p text:style-name="Text_20_body">#include “main_config.h” #include &lt;builtins.h&gt;</text:p>
      <text:p text:style-name="Text_20_body">#define MENU_ITEMS 6U #define MENU_INACTIVITY 300U /* 300 × 100 ms = 30 s auto-logout threshold <text:span text:style-name="T1">/ #define LOGOUT_INDEX 5U /</text:span> Last item — handled separately in update() */</text:p>
      <text:p text:style-name="Text_20_body">static const char * const labels[MENU_ITEMS] = { “VIEW LOG”, “CLEAR LOG”, “DOWNLOAD LOG”, “SET TIME”, “CHANGE PASSWORD”, “LOGOUT” };</text:p>
      <text:p text:style-name="Text_20_body">/* Destinations for items 0..4 — LOGOUT (index 5) is handled explicitly */ static const STATE destinations[MENU_ITEMS - 1U] = { VIEW_LOGS, CLEAR_LOGS, DOWNLOAD_LOGS, SET_TIME, CHANGE_PASSWORD };</text:p>
      <text:p text:style-name="Text_20_body">static unsigned char selection = 0; static unsigned char last_drawn = 0xFFU; /* Sentinel — forces first draw, never used as index */</text:p>
      <text:p text:style-name="Text_20_body">void menu_reset(void) { selection = 0; last_drawn = 0xFFU; reset_timeout_tick(); /* Inactivity timer starts fresh on state entry */ }</text:p>
      <text:p text:style-name="Text_20_body">/* UPDATE — scrolls selection, triggers transitions. Zero LCD writes. <text:span text:style-name="T1">/ void menu_update(EVENT evt) { /</text:span> Any keypress resets the inactivity timer */ if (evt != EVENT_NONE) reset_timeout_tick();</text:p>
      <text:p text:style-name="P465">/* Inactivity auto-logout */</text:p>
      <text:p text:style-name="P466">if (timeout_tick &gt;= MENU_INACTIVITY)</text:p>
      <text:p text:style-name="P467">{</text:p>
      <text:p text:style-name="P468"><text:s text:c="4"/>uart_puts("[MENU] INACTIVITY — auto-logout\r\n");</text:p>
      <text:p text:style-name="P469"><text:s text:c="4"/>do_logout();</text:p>
      <text:p text:style-name="P470"><text:s text:c="4"/>invalidate_dashboard_cache();</text:p>
      <text:p text:style-name="P471"><text:s text:c="4"/>menu_reset();</text:p>
      <text:p text:style-name="P472"><text:s text:c="4"/>set_status(DASHBOARD);</text:p>
      <text:p text:style-name="P473"><text:s text:c="4"/>return;</text:p>
      <text:p text:style-name="P474">}</text:p>
      <text:p text:style-name="P475"/>
      <text:p text:style-name="P476">if (evt == EVENT_SW2 &amp;&amp; selection &lt; MENU_ITEMS - 1U)</text:p>
      <text:p text:style-name="P477">{</text:p>
      <text:p text:style-name="P478"><text:s text:c="4"/>selection++;</text:p>
      <text:p text:style-name="P479">}</text:p>
      <text:p text:style-name="P480">else if (evt == EVENT_SW3 &amp;&amp; selection &gt; 0U)</text:p>
      <text:p text:style-name="P481">{</text:p>
      <text:p text:style-name="P482"><text:s text:c="4"/>selection--;</text:p>
      <text:p text:style-name="P483">}</text:p>
      <text:p text:style-name="P484">else if (evt == EVENT_SW4)</text:p>
      <text:p text:style-name="P485">{</text:p>
      <text:p text:style-name="P486"><text:s text:c="4"/>if (selection == LOGOUT_INDEX)</text:p>
      <text:p text:style-name="P487"><text:s text:c="4"/>{</text:p>
      <text:p text:style-name="P488"><text:s text:c="8"/>uart_puts("[MENU] LOGOUT\r\n");</text:p>
      <text:p text:style-name="P489"><text:s text:c="8"/>do_logout();</text:p>
      <text:p text:style-name="P490"><text:s text:c="8"/>menu_reset();</text:p>
      <text:p text:style-name="P491"><text:s text:c="8"/>clcd_clear();</text:p>
      <text:p text:style-name="P492"><text:s text:c="8"/>clcd_print("LOGGED OUT", LINE1(0));</text:p>
      <text:p text:style-name="P493"><text:s text:c="8"/>__delay_ms(2000);</text:p>
      <text:p text:style-name="P494"><text:s text:c="8"/>invalidate_dashboard_cache();</text:p>
      <text:p text:style-name="P495"><text:s text:c="8"/>set_status(DASHBOARD);</text:p>
      <text:p text:style-name="P496"><text:s text:c="4"/>}</text:p>
      <text:p text:style-name="P497"><text:s text:c="4"/>else</text:p>
      <text:p text:style-name="P498"><text:s text:c="4"/>{</text:p>
      <text:p text:style-name="P499"><text:s text:c="8"/>uart_puts("[MENU] SELECT: ");</text:p>
      <text:p text:style-name="P500"><text:s text:c="8"/>uart_puts(labels[selection]);</text:p>
      <text:p text:style-name="P501"><text:s text:c="8"/>uart_puts("\r\n");</text:p>
      <text:p text:style-name="P502"><text:s text:c="8"/>set_status(destinations[selection]);</text:p>
      <text:p text:style-name="P503"><text:s text:c="8"/>menu_reset();</text:p>
      <text:p text:style-name="P504"><text:s text:c="4"/>}</text:p>
      <text:p text:style-name="P505">}</text:p>
      <text:p text:style-name="P506">else if (evt == EVENT_SW1)</text:p>
      <text:p text:style-name="P507">{</text:p>
      <text:p text:style-name="P508"><text:s text:c="4"/>uart_puts("[MENU] BACK\r\n");</text:p>
      <text:p text:style-name="P509"><text:s text:c="4"/>set_status(DASHBOARD);</text:p>
      <text:p text:style-name="P510"><text:s text:c="4"/>invalidate_dashboard_cache();</text:p>
      <text:p text:style-name="P511"><text:s text:c="4"/>menu_reset();</text:p>
      <text:p text:style-name="P512">}</text:p>
      <text:p text:style-name="First_20_paragraph">}</text:p>
      <text:p text:style-name="Text_20_body">/* RENDER — draws two rows. Skips if selection unchanged. */ void menu_render(void) { if (selection == last_drawn) return; last_drawn = selection;</text:p>
      <text:p text:style-name="P513">clcd_putch('&gt;', <text:s text:c="14"/>LINE1(0));</text:p>
      <text:p text:style-name="P514">clcd_putch(' ', <text:s text:c="14"/>LINE1(1));</text:p>
      <text:p text:style-name="P515">clcd_print(labels[selection], LINE1(2));</text:p>
      <text:p text:style-name="P516"/>
      <text:p text:style-name="P517">clcd_putch(' ', LINE2(0));</text:p>
      <text:p text:style-name="P518">clcd_putch(' ', LINE2(1));</text:p>
      <text:p text:style-name="P519">if (selection &lt; MENU_ITEMS - 1U)</text:p>
      <text:p text:style-name="P520"><text:s text:c="4"/>clcd_print(labels[selection + 1U], LINE2(2));</text:p>
      <text:p text:style-name="P521">else</text:p>
      <text:p text:style-name="P522"><text:s text:c="4"/>clcd_print(" <text:s text:c="14"/>", LINE2(2));</text:p>
      <text:p text:style-name="First_20_paragraph">}/** * @file set_password.c * @author krubro * @date 2026-05-09 * @brief Change-password module — dual-buffer PIN entry, EEPROM persistence. <text:span text:style-name="T1"> </text:span> Architecture notes: * set_password_update() — processes timer ticks and events, mutates phase. Zero LCD writes. * set_password_render() — writes LCD from phase. Zero hardware reads, zero state mutation * except for one-shot transitions (MATCH, MISMATCH) which advance * the phase after the feedback frame is displayed. <text:span text:style-name="T1"> </text:span> Password storage: * The new PIN is written to EEPROM at EEPROM_PASS_ADDR (4 bytes). * login_set_password() is then called so the running login module adopts * the new password immediately without a reboot. * On next power-on, login_load_password() reads EEPROM_PASS_ADDR back into RAM. <text:span text:style-name="T1"> </text:span> Timing source: * blink_tick (Timer0, ~10 ms) — cursor toggle and entry cooldown. * timeout_tick (Timer1, ~100 ms) — 10 s inactivity timeout. * Both counters are reset in set_password_reset() so they start fresh each entry. */</text:p>
      <text:p text:style-name="Text_20_body">#include “main_config.h”</text:p>
      <text:p text:style-name="Text_20_body">#define CP_BLINK_THRESHOLD 20U // ~200 ms per blink toggle (same cadence as login) #define CP_TIMEOUT_TICKS 100U // 100 × 100 ms = 10 s inactivity timeout #define CP_COOLDOWN_TICKS 2U // 2 blink ticks = ~200 ms — swallows entry keypress</text:p>
      <text:p text:style-name="Text_20_body">typedef enum { CP_ENTER_NEW, // Waiting for the first 4-digit PIN CP_RE_ENTER, // Waiting for the confirmation PIN CP_MATCH, // Both PINs match — render writes EEPROM, then → MENU CP_MISMATCH // PINs differ — render shows feedback, then resets to CP_ENTER_NEW } CP_PHASE;</text:p>
      <text:p text:style-name="Text_20_body">static CP_PHASE phase = CP_ENTER_NEW; static unsigned char new_pass[PASS_LENGTH]; // First entry buffer static unsigned char re_pass[PASS_LENGTH]; // Re-entry confirmation buffer static unsigned char digit_count = 0; static unsigned char cursor_visible = 1; static unsigned char screen_ready = 0; static unsigned char cooldown_ticks = 0;</text:p>
      <text:p text:style-name="Text_20_body">/* ========================================================================= * set_password_reset — call once on transition INTO CHANGE_PASSWORD state * ========================================================================= */</text:p>
      <text:p text:style-name="Text_20_body">void set_password_reset(void) { phase = CP_ENTER_NEW; digit_count = 0; cursor_visible = 1; screen_ready = 0; cooldown_ticks = 0; // Block input for ~200 ms to swallow the menu SW4 press reset_blink_tick(); reset_timeout_tick(); }</text:p>
      <text:p text:style-name="Text_20_body">/* ========================================================================= * UPDATE — advances phase from timer ticks and events. Zero LCD writes. * ========================================================================= */</text:p>
      <text:p text:style-name="Text_20_body">void set_password_update(EVENT evt) { // One-shot phases are consumed entirely inside render — nothing to do here if (phase == CP_MATCH || phase == CP_MISMATCH) return;</text:p>
      <text:p text:style-name="P523">// Timer0: cursor blink and entry cooldown counter</text:p>
      <text:p text:style-name="P524">if (blink_tick &gt;= CP_BLINK_THRESHOLD)</text:p>
      <text:p text:style-name="P525">{</text:p>
      <text:p text:style-name="P526"><text:s text:c="4"/>reset_blink_tick();</text:p>
      <text:p text:style-name="P527"><text:s text:c="4"/>cursor_visible = !cursor_visible;</text:p>
      <text:p text:style-name="P528"><text:s text:c="4"/>if (cooldown_ticks &lt; CP_COOLDOWN_TICKS) cooldown_ticks++;</text:p>
      <text:p text:style-name="P529">}</text:p>
      <text:p text:style-name="P530"/>
      <text:p text:style-name="P531">// Timer1: 10 s inactivity timeout — back to MENU on idle</text:p>
      <text:p text:style-name="P532">if (evt == EVENT_NONE &amp;&amp; timeout_tick &gt;= CP_TIMEOUT_TICKS)</text:p>
      <text:p text:style-name="P533">{</text:p>
      <text:p text:style-name="P534"><text:s text:c="4"/>uart_puts("[CP] TIMEOUT — returning to MENU\r\n");</text:p>
      <text:p text:style-name="P535"><text:s text:c="4"/>menu_reset();</text:p>
      <text:p text:style-name="P536"><text:s text:c="4"/>set_status(MENU);</text:p>
      <text:p text:style-name="P537"><text:s text:c="4"/>return;</text:p>
      <text:p text:style-name="P538">}</text:p>
      <text:p text:style-name="P539"/>
      <text:p text:style-name="P540">// Any input resets the idle timer</text:p>
      <text:p text:style-name="P541">if (evt != EVENT_NONE)</text:p>
      <text:p text:style-name="P542"><text:s text:c="4"/>reset_timeout_tick();</text:p>
      <text:p text:style-name="P543"/>
      <text:p text:style-name="P544">// SW1: discard and return to MENU at any entry stage</text:p>
      <text:p text:style-name="P545">if (evt == EVENT_SW1)</text:p>
      <text:p text:style-name="P546">{</text:p>
      <text:p text:style-name="P547"><text:s text:c="4"/>uart_puts("[CP] CANCELLED\r\n");</text:p>
      <text:p text:style-name="P548"><text:s text:c="4"/>menu_reset();</text:p>
      <text:p text:style-name="P549"><text:s text:c="4"/>set_status(MENU);</text:p>
      <text:p text:style-name="P550"><text:s text:c="4"/>return;</text:p>
      <text:p text:style-name="P551">}</text:p>
      <text:p text:style-name="P552"/>
      <text:p text:style-name="P553">// Block digit input for the first ~200 ms (swallows the SW4 that entered this state)</text:p>
      <text:p text:style-name="P554">if (cooldown_ticks &lt; CP_COOLDOWN_TICKS)</text:p>
      <text:p text:style-name="P555"><text:s text:c="4"/>return;</text:p>
      <text:p text:style-name="P556"/>
      <text:p text:style-name="P557">// Digit entry — SW4 = '0', SW5 = '1'</text:p>
      <text:p text:style-name="P558">if (digit_count &lt; PASS_LENGTH &amp;&amp; (evt == EVENT_SW4 || evt == EVENT_SW5))</text:p>
      <text:p text:style-name="P559">{</text:p>
      <text:p text:style-name="P560"><text:s text:c="4"/>unsigned char val = (evt == EVENT_SW4) ? '0' : '1';</text:p>
      <text:p text:style-name="P561"/>
      <text:p text:style-name="P562"><text:s text:c="4"/>if (phase == CP_ENTER_NEW)</text:p>
      <text:p text:style-name="P563"><text:s text:c="8"/>new_pass[digit_count] = val;</text:p>
      <text:p text:style-name="P564"><text:s text:c="4"/>else</text:p>
      <text:p text:style-name="P565"><text:s text:c="8"/>re_pass[digit_count] = val;</text:p>
      <text:p text:style-name="P566"/>
      <text:p text:style-name="P567"><text:s text:c="4"/>digit_count++;</text:p>
      <text:p text:style-name="P568"><text:s text:c="4"/>cursor_visible = 1;</text:p>
      <text:p text:style-name="P569"><text:s text:c="4"/>reset_blink_tick();</text:p>
      <text:p text:style-name="P570"/>
      <text:p text:style-name="P571"><text:s text:c="4"/>uart_puts("[CP] digit ");</text:p>
      <text:p text:style-name="P572"><text:s text:c="4"/>uart_putchar((char)('0' + digit_count));</text:p>
      <text:p text:style-name="P573"><text:s text:c="4"/>uart_puts("\r\n");</text:p>
      <text:p text:style-name="P574">}</text:p>
      <text:p text:style-name="P575"/>
      <text:p text:style-name="P576">// Transition on 4th digit</text:p>
      <text:p text:style-name="P577">if (digit_count == PASS_LENGTH)</text:p>
      <text:p text:style-name="P578">{</text:p>
      <text:p text:style-name="P579"><text:s text:c="4"/>if (phase == CP_ENTER_NEW)</text:p>
      <text:p text:style-name="P580"><text:s text:c="4"/>{</text:p>
      <text:p text:style-name="P581"><text:s text:c="8"/>uart_puts("[CP] first entry complete — awaiting re-entry\r\n");</text:p>
      <text:p text:style-name="P582"><text:s text:c="8"/>phase <text:s text:c="7"/>= CP_RE_ENTER;</text:p>
      <text:p text:style-name="P583"><text:s text:c="8"/>digit_count <text:s text:c="1"/>= 0;</text:p>
      <text:p text:style-name="P584"><text:s text:c="8"/>screen_ready = 0; <text:s text:c="6"/>// Force redraw for the re-entry prompt</text:p>
      <text:p text:style-name="P585"><text:s text:c="8"/>cursor_visible = 1;</text:p>
      <text:p text:style-name="P586"><text:s text:c="8"/>reset_blink_tick();</text:p>
      <text:p text:style-name="P587"><text:s text:c="4"/>}</text:p>
      <text:p text:style-name="P588"><text:s text:c="4"/>else</text:p>
      <text:p text:style-name="P589"><text:s text:c="4"/>{</text:p>
      <text:p text:style-name="P590"><text:s text:c="8"/>// Compare the two buffers</text:p>
      <text:p text:style-name="P591"><text:s text:c="8"/>unsigned char k;</text:p>
      <text:p text:style-name="P592"><text:s text:c="8"/>unsigned char match = 1;</text:p>
      <text:p text:style-name="P593"><text:s text:c="8"/>for (k = 0; k &lt; PASS_LENGTH; k++)</text:p>
      <text:p text:style-name="P594"><text:s text:c="8"/>{</text:p>
      <text:p text:style-name="P595"><text:s text:c="12"/>if (new_pass[k] != re_pass[k]) { match = 0; break; }</text:p>
      <text:p text:style-name="P596"><text:s text:c="8"/>}</text:p>
      <text:p text:style-name="P597"/>
      <text:p text:style-name="P598"><text:s text:c="8"/>phase = match ? CP_MATCH : CP_MISMATCH;</text:p>
      <text:p text:style-name="P599"/>
      <text:p text:style-name="P600"><text:s text:c="8"/>if (match)</text:p>
      <text:p text:style-name="P601"><text:s text:c="12"/>uart_puts("[CP] MATCH — writing to EEPROM\r\n");</text:p>
      <text:p text:style-name="P602"><text:s text:c="8"/>else</text:p>
      <text:p text:style-name="P603"><text:s text:c="12"/>uart_puts("[CP] MISMATCH — resetting\r\n");</text:p>
      <text:p text:style-name="P604"><text:s text:c="4"/>}</text:p>
      <text:p text:style-name="P605">}</text:p>
      <text:p text:style-name="First_20_paragraph">}</text:p>
      <text:p text:style-name="Text_20_body">/* ========================================================================= * RENDER — writes LCD from phase. No hardware reads. * One-shot frames (MATCH, MISMATCH) advance the phase after display. * ========================================================================= */</text:p>
      <text:p text:style-name="Text_20_body">void set_password_render(void) { unsigned char k;</text:p>
      <text:p text:style-name="P606">// ── MATCH: write EEPROM, update live login, transition to MENU ─────────</text:p>
      <text:p text:style-name="P607">if (phase == CP_MATCH)</text:p>
      <text:p text:style-name="P608">{</text:p>
      <text:p text:style-name="P609"><text:s text:c="4"/>clcd_clear();</text:p>
      <text:p text:style-name="P610"><text:s text:c="4"/>clcd_print("PASS CHANGED <text:s text:c="3"/>", LINE1(0));</text:p>
      <text:p text:style-name="P611"><text:s text:c="4"/>clcd_print("Saving... <text:s text:c="6"/>", LINE2(0));</text:p>
      <text:p text:style-name="P612"/>
      <text:p text:style-name="P613"><text:s text:c="4"/>// Persist new PIN to EEPROM — 4 bytes starting at EEPROM_PASS_ADDR</text:p>
      <text:p text:style-name="P614"><text:s text:c="4"/>for (k = 0; k &lt; PASS_LENGTH; k++)</text:p>
      <text:p text:style-name="P615"><text:s text:c="8"/>eeprom_write_byte((unsigned int)(EEPROM_PASS_ADDR + k), new_pass[k]);</text:p>
      <text:p text:style-name="P616"/>
      <text:p text:style-name="P617"><text:s text:c="4"/>// Update the running login module immediately (no reboot required)</text:p>
      <text:p text:style-name="P618"><text:s text:c="4"/>login_set_password(new_pass);</text:p>
      <text:p text:style-name="P619"/>
      <text:p text:style-name="P620"><text:s text:c="4"/>uart_puts("[CP] EEPROM write complete\r\n");</text:p>
      <text:p text:style-name="P621"><text:s text:c="4"/>__delay_ms(1500);</text:p>
      <text:p text:style-name="P622"/>
      <text:p text:style-name="P623"><text:s text:c="4"/>menu_reset();</text:p>
      <text:p text:style-name="P624"><text:s text:c="4"/>set_status(MENU);</text:p>
      <text:p text:style-name="P625"><text:s text:c="4"/>return;</text:p>
      <text:p text:style-name="P626">}</text:p>
      <text:p text:style-name="P627"/>
      <text:p text:style-name="P628">// ── MISMATCH: show feedback, reset to CP_ENTER_NEW ────────────────────</text:p>
      <text:p text:style-name="P629">if (phase == CP_MISMATCH)</text:p>
      <text:p text:style-name="P630">{</text:p>
      <text:p text:style-name="P631"><text:s text:c="4"/>clcd_clear();</text:p>
      <text:p text:style-name="P632"><text:s text:c="4"/>clcd_print("MISMATCH! <text:s text:c="6"/>", LINE1(0));</text:p>
      <text:p text:style-name="P633"><text:s text:c="4"/>clcd_print("Try Again <text:s text:c="6"/>", LINE2(0));</text:p>
      <text:p text:style-name="P634"><text:s text:c="4"/>__delay_ms(1500);</text:p>
      <text:p text:style-name="P635"/>
      <text:p text:style-name="P636"><text:s text:c="4"/>// Full reset — user starts from scratch with a new first entry</text:p>
      <text:p text:style-name="P637"><text:s text:c="4"/>set_password_reset();</text:p>
      <text:p text:style-name="P638"><text:s text:c="4"/>return;</text:p>
      <text:p text:style-name="P639">}</text:p>
      <text:p text:style-name="P640"/>
      <text:p text:style-name="P641">// ── CP_ENTER_NEW / CP_RE_ENTER: PIN entry prompt ───────────────────────</text:p>
      <text:p text:style-name="P642"/>
      <text:p text:style-name="P643">// Draw static header once per phase entry</text:p>
      <text:p text:style-name="P644">if (!screen_ready)</text:p>
      <text:p text:style-name="P645">{</text:p>
      <text:p text:style-name="P646"><text:s text:c="4"/>clcd_clear();</text:p>
      <text:p text:style-name="P647"><text:s text:c="4"/>clcd_print(phase == CP_ENTER_NEW ? "New Pass: <text:s text:c="6"/>"</text:p>
      <text:p text:style-name="P648"><text:s text:c="37"/>: "Re-enter Pass: <text:s text:c="1"/>", LINE1(0));</text:p>
      <text:p text:style-name="P649"><text:s text:c="4"/>for (k = 0; k &lt; PASS_LENGTH; k++) clcd_putch(' ', LINE2(k));</text:p>
      <text:p text:style-name="P650"><text:s text:c="4"/>screen_ready = 1;</text:p>
      <text:p text:style-name="P651">}</text:p>
      <text:p text:style-name="P652"/>
      <text:p text:style-name="P653">// Draw confirmed digits as asterisks</text:p>
      <text:p text:style-name="P654">for (k = 0; k &lt; digit_count; k++)</text:p>
      <text:p text:style-name="P655"><text:s text:c="4"/>clcd_putch('*', LINE2(k));</text:p>
      <text:p text:style-name="P656"/>
      <text:p text:style-name="P657">// Draw blinking cursor at the active position</text:p>
      <text:p text:style-name="P658">if (digit_count &lt; PASS_LENGTH)</text:p>
      <text:p text:style-name="P659"><text:s text:c="4"/>clcd_putch(cursor_visible ? '_' : ' ', LINE2(digit_count));</text:p>
      <text:p text:style-name="First_20_paragraph">}/** * @file set_time.c * @author krubro * @date 2026-05-09 * @brief Set-time module — local copy isolation, field rollover, DS1307 commit on SW2. <text:span text:style-name="T1"> </text:span> Architecture notes: * set_time_update() — processes events, mutates local copy only. Zero LCD writes. * set_time_render() — writes LCD from local copy. Zero DS1307 access. * DS1307 is written ONLY in set_time_update() on EVENT_SW2 (confirm). <text:span text:style-name="T1"> </text:span> Copy isolation: * set_time_reset() reads sys.hours/minutes/seconds (BCD from DS1307) and * decodes them to plain decimal values (0–23, 0–59) for easy arithmetic. * On SW2, they are re-encoded to BCD before being written to the DS1307. <text:span text:style-name="T1"> </text:span> Render — blinking field: * The active field blinks every ST_BLINK_THRESHOLD Timer0 ticks (~250 ms). * Inactive fields are always shown solid. Only the active field flickers. <text:span text:style-name="T1"> </text:span> CLCD layout: * Row 1: “Set Time SW2:OK” * Row 2: “HH:MM:SS” active field blinks */</text:p>
      <text:p text:style-name="Text_20_body">#include “main_config.h”</text:p>
      <text:p text:style-name="Text_20_body">#define ST_BLINK_THRESHOLD 25U // ~250 ms per blink toggle (Timer0, ~10 ms tick)</text:p>
      <text:p text:style-name="Text_20_body">// Field indices #define FIELD_HH 0U #define FIELD_MM 1U #define FIELD_SS 2U #define FIELD_COUNT 3U</text:p>
      <text:p text:style-name="Text_20_body">// Rollover limits (decimal, not BCD) static const unsigned char field_max[FIELD_COUNT] = {23U, 59U, 59U};</text:p>
      <text:p text:style-name="Text_20_body">static unsigned char time_copy[FIELD_COUNT]; // Decoded decimal: [0]=HH, [1]=MM, [2]=SS static unsigned char active_field = FIELD_HH; static unsigned char blink_state = 1; // 1 = field visible, 0 = blanked static unsigned char screen_ready = 0;</text:p>
      <text:p text:style-name="Text_20_body">/* ========================================================================= * Private — BCD helpers * ========================================================================= */</text:p>
      <text:p text:style-name="Text_20_body">// DS1307 stores time as BCD (e.g. 0x23 = 23 decimal) static unsigned char bcd_to_dec(unsigned char bcd) { return (unsigned char)(((bcd &gt;&gt; 4) &amp; 0x0FU) * 10U + (bcd &amp; 0x0FU)); }</text:p>
      <text:p text:style-name="Text_20_body">static unsigned char dec_to_bcd(unsigned char dec) { return (unsigned char)(((dec / 10U) &lt;&lt; 4) | (dec % 10U)); }</text:p>
      <text:p text:style-name="Text_20_body">/* ========================================================================= * set_time_reset — call once on transition INTO SET_TIME state * ========================================================================= */</text:p>
      <text:p text:style-name="Text_20_body">void set_time_reset(void) { // Copy and decode current sys time — edits stay local until SW2 time_copy[FIELD_HH] = bcd_to_dec(sys.hours); time_copy[FIELD_MM] = bcd_to_dec(sys.minutes); time_copy[FIELD_SS] = bcd_to_dec(sys.seconds);</text:p>
      <text:p text:style-name="P660">active_field = FIELD_HH;</text:p>
      <text:p text:style-name="P661">blink_state <text:s text:c="1"/>= 1;</text:p>
      <text:p text:style-name="P662">screen_ready = 0;</text:p>
      <text:p text:style-name="P663">reset_blink_tick();</text:p>
      <text:p text:style-name="First_20_paragraph">}</text:p>
      <text:p text:style-name="Text_20_body">/* ========================================================================= * UPDATE — field navigation and value editing. Zero LCD writes. * ========================================================================= */</text:p>
      <text:p text:style-name="Text_20_body">void set_time_update(EVENT evt) { // Timer0: blink tick for active field if (blink_tick &gt;= ST_BLINK_THRESHOLD) { reset_blink_tick(); blink_state = !blink_state; }</text:p>
      <text:p text:style-name="P664">if (evt == EVENT_NONE)</text:p>
      <text:p text:style-name="P665"><text:s text:c="4"/>return;</text:p>
      <text:p text:style-name="P666"/>
      <text:p text:style-name="P667">// SW1: discard all edits — DS1307 is never touched</text:p>
      <text:p text:style-name="P668">if (evt == EVENT_SW1)</text:p>
      <text:p text:style-name="P669">{</text:p>
      <text:p text:style-name="P670"><text:s text:c="4"/>uart_puts("[SET_TIME] DISCARDED — RTC unchanged\r\n");</text:p>
      <text:p text:style-name="P671"><text:s text:c="4"/>menu_reset();</text:p>
      <text:p text:style-name="P672"><text:s text:c="4"/>set_status(MENU);</text:p>
      <text:p text:style-name="P673"><text:s text:c="4"/>return;</text:p>
      <text:p text:style-name="P674">}</text:p>
      <text:p text:style-name="P675"/>
      <text:p text:style-name="P676">// SW2: commit local copy to DS1307 (re-encode decimal → BCD)</text:p>
      <text:p text:style-name="P677">if (evt == EVENT_SW2)</text:p>
      <text:p text:style-name="P678">{</text:p>
      <text:p text:style-name="P679"><text:s text:c="4"/>ds1307_i2c_write(dec_to_bcd(time_copy[FIELD_SS]), SEC_ADDRESS);</text:p>
      <text:p text:style-name="P680"><text:s text:c="4"/>ds1307_i2c_write(dec_to_bcd(time_copy[FIELD_MM]), MIN_ADDRESS);</text:p>
      <text:p text:style-name="P681"><text:s text:c="4"/>ds1307_i2c_write(dec_to_bcd(time_copy[FIELD_HH]), HOUR_ADDRESS);</text:p>
      <text:p text:style-name="P682"/>
      <text:p text:style-name="P683"><text:s text:c="4"/>// Mirror into sys so the dashboard reflects the change instantly</text:p>
      <text:p text:style-name="P684"><text:s text:c="4"/>sys.hours <text:s text:c="2"/>= dec_to_bcd(time_copy[FIELD_HH]);</text:p>
      <text:p text:style-name="P685"><text:s text:c="4"/>sys.minutes = dec_to_bcd(time_copy[FIELD_MM]);</text:p>
      <text:p text:style-name="P686"><text:s text:c="4"/>sys.seconds = dec_to_bcd(time_copy[FIELD_SS]);</text:p>
      <text:p text:style-name="P687"/>
      <text:p text:style-name="P688"><text:s text:c="4"/>uart_puts("[SET_TIME] SAVED to DS1307\r\n");</text:p>
      <text:p text:style-name="P689"><text:s text:c="4"/>menu_reset();</text:p>
      <text:p text:style-name="P690"><text:s text:c="4"/>set_status(MENU);</text:p>
      <text:p text:style-name="P691"><text:s text:c="4"/>return;</text:p>
      <text:p text:style-name="P692">}</text:p>
      <text:p text:style-name="P693"/>
      <text:p text:style-name="P694">// SW6: cycle active field HH → MM → SS → HH</text:p>
      <text:p text:style-name="P695">if (evt == EVENT_SW6)</text:p>
      <text:p text:style-name="P696">{</text:p>
      <text:p text:style-name="P697"><text:s text:c="4"/>active_field = (unsigned char)((active_field + 1U) % FIELD_COUNT);</text:p>
      <text:p text:style-name="P698"><text:s text:c="4"/>blink_state <text:s text:c="1"/>= 1; <text:s text:c="14"/>// Show field solid immediately on shift</text:p>
      <text:p text:style-name="P699"><text:s text:c="4"/>reset_blink_tick();</text:p>
      <text:p text:style-name="P700"><text:s text:c="4"/>return;</text:p>
      <text:p text:style-name="P701">}</text:p>
      <text:p text:style-name="P702"/>
      <text:p text:style-name="P703">// SW4: increment with rollover</text:p>
      <text:p text:style-name="P704">if (evt == EVENT_SW4)</text:p>
      <text:p text:style-name="P705">{</text:p>
      <text:p text:style-name="P706"><text:s text:c="4"/>time_copy[active_field] = (time_copy[active_field] &gt;= field_max[active_field])</text:p>
      <text:p text:style-name="P707"><text:s text:c="30"/>? 0U</text:p>
      <text:p text:style-name="P708"><text:s text:c="30"/>: time_copy[active_field] + 1U;</text:p>
      <text:p text:style-name="P709"><text:s text:c="4"/>blink_state = 1; <text:s text:c="15"/>// Force field visible after edit</text:p>
      <text:p text:style-name="P710"><text:s text:c="4"/>reset_blink_tick();</text:p>
      <text:p text:style-name="P711"><text:s text:c="4"/>return;</text:p>
      <text:p text:style-name="P712">}</text:p>
      <text:p text:style-name="P713"/>
      <text:p text:style-name="P714">// SW5: decrement with underflow protection</text:p>
      <text:p text:style-name="P715">if (evt == EVENT_SW5)</text:p>
      <text:p text:style-name="P716">{</text:p>
      <text:p text:style-name="P717"><text:s text:c="4"/>time_copy[active_field] = (time_copy[active_field] == 0U)</text:p>
      <text:p text:style-name="P718"><text:s text:c="30"/>? field_max[active_field]</text:p>
      <text:p text:style-name="P719"><text:s text:c="30"/>: time_copy[active_field] - 1U;</text:p>
      <text:p text:style-name="P720"><text:s text:c="4"/>blink_state = 1;</text:p>
      <text:p text:style-name="P721"><text:s text:c="4"/>reset_blink_tick();</text:p>
      <text:p text:style-name="P722"><text:s text:c="4"/>return;</text:p>
      <text:p text:style-name="P723">}</text:p>
      <text:p text:style-name="First_20_paragraph">}</text:p>
      <text:p text:style-name="Text_20_body">/* ========================================================================= * RENDER — reads local copy, writes LCD. No DS1307 access. * ========================================================================= */</text:p>
      <text:p text:style-name="Text_20_body">void set_time_render(void) { unsigned char f;</text:p>
      <text:p text:style-name="P724">// Draw static header once per state entry</text:p>
      <text:p text:style-name="P725">if (!screen_ready)</text:p>
      <text:p text:style-name="P726">{</text:p>
      <text:p text:style-name="P727"><text:s text:c="4"/>clcd_clear();</text:p>
      <text:p text:style-name="P728"><text:s text:c="4"/>clcd_print("Set Time <text:s text:c="1"/>SW2:OK", LINE1(0));</text:p>
      <text:p text:style-name="P729"><text:s text:c="4"/>clcd_putch(':', LINE2(2));</text:p>
      <text:p text:style-name="P730"><text:s text:c="4"/>clcd_putch(':', LINE2(5));</text:p>
      <text:p text:style-name="P731"><text:s text:c="4"/>clcd_print(" <text:s text:c="1"/>SW1:Back <text:s text:c="5"/>", LINE2(8));</text:p>
      <text:p text:style-name="P732"><text:s text:c="4"/>screen_ready = 1;</text:p>
      <text:p text:style-name="P733">}</text:p>
      <text:p text:style-name="P734"/>
      <text:p text:style-name="P735">// Render each of the 3 fields — blink only the active one</text:p>
      <text:p text:style-name="P736">for (f = 0; f &lt; FIELD_COUNT; f++)</text:p>
      <text:p text:style-name="P737">{</text:p>
      <text:p text:style-name="P738"><text:s text:c="4"/>unsigned char col = (unsigned char)(f * 3U); // HH=0, MM=3, SS=6</text:p>
      <text:p text:style-name="P739"/>
      <text:p text:style-name="P740"><text:s text:c="4"/>if (f == active_field &amp;&amp; blink_state == 0)</text:p>
      <text:p text:style-name="P741"><text:s text:c="4"/>{</text:p>
      <text:p text:style-name="P742"><text:s text:c="8"/>// Blank the active field during the OFF half of the blink cycle</text:p>
      <text:p text:style-name="P743"><text:s text:c="8"/>clcd_putch(' ', LINE2(col));</text:p>
      <text:p text:style-name="P744"><text:s text:c="8"/>clcd_putch(' ', LINE2(col + 1U));</text:p>
      <text:p text:style-name="P745"><text:s text:c="4"/>}</text:p>
      <text:p text:style-name="P746"><text:s text:c="4"/>else</text:p>
      <text:p text:style-name="P747"><text:s text:c="4"/>{</text:p>
      <text:p text:style-name="P748"><text:s text:c="8"/>clcd_putch((char)(time_copy[f] / 10U + '0'), LINE2(col));</text:p>
      <text:p text:style-name="P749"><text:s text:c="8"/>clcd_putch((char)(time_copy[f] % 10U + '0'), LINE2(col + 1U));</text:p>
      <text:p text:style-name="P750"><text:s text:c="4"/>}</text:p>
      <text:p text:style-name="P751">}</text:p>
      <text:p text:style-name="First_20_paragraph">}/** * @file state.c * @author krubro * @date 2026-05-09 * @brief Global state machine with UART transition logging. */</text:p>
      <text:p text:style-name="Text_20_body">#include “main_config.h”</text:p>
      <text:p text:style-name="Text_20_body">static STATE current_state = DASHBOARD;</text:p>
      <text:p text:style-name="Text_20_body">/* Names match the STATE enum order in state.h. <text:span text:style-name="T1">/ static const char </text:span> const state_names[] = { “DASHBOARD”, “LOGIN”, “MENU”, “VIEW_LOGS”, “CLEAR_LOGS”, “DOWNLOAD_LOGS”, “SET_TIME”, “CHANGE_PASSWORD” };</text:p>
      <text:p text:style-name="Text_20_body">void set_status(STATE new_state) { clcd_clear(); uart_puts(“[STATE]”); uart_puts(state_names[new_state]); uart_puts(“”); current_state = new_state; }</text:p>
      <text:p text:style-name="Text_20_body">STATE get_status(void) { return current_state; }/** * @file timer.c * @author krubro * @date 2026-05-08 * @brief Timer0 and Timer1 ISR driver — replaces all software loop timers. <text:span text:style-name="T1"> </text:span> @details * Timer0 — 8-bit, internal clock, prescaler 1:256 * Overflow period = (256 - TMR0_PRELOAD) * 256 * (1 / (FOSC/4)) * = 195 * 256 * 200 ns ≈ 9.98 ms → blink_tick <text:span text:style-name="T1"> </text:span> Timer1 — 16-bit, internal clock, prescaler 1:8 * Overflow period = (65536 - TMR1_PRELOAD) * 8 * (1 / (FOSC/4)) * = 62500 * 8 * 200 ns = 100.0 ms → timeout_tick */</text:p>
      <text:p text:style-name="Text_20_body">#include “main_config.h”</text:p>
      <text:p text:style-name="Text_20_body">// Timer0: reload value for ~10 ms at 20 MHz / 4 with 1:256 prescaler #define TMR0_PRELOAD 61U // 256 - 195 = 61</text:p>
      <text:p text:style-name="Text_20_body">// Timer1: reload value for ~100 ms at 20 MHz / 4 with 1:8 prescaler #define TMR1_PRELOAD 3036U // 65536 - 62500 = 3036 #define TMR1H_PRELOAD ((TMR1_PRELOAD) &gt;&gt; 8) // 0x0B #define TMR1L_PRELOAD ((TMR1_PRELOAD) &amp; 0xFFU) // 0xEC</text:p>
      <text:p text:style-name="Text_20_body">volatile unsigned char blink_tick = 0; volatile unsigned int timeout_tick = 0;</text:p>
      <text:p text:style-name="Text_20_body">/** * @brief Configures Timer0 (prescaler 1:256) and Timer1 (prescaler 1:8), * then enables Timer0, Timer1, peripheral, and global interrupts. */ void init_timers(void) { // Timer0: internal clock (T0CS=0), prescaler to TMR0 (PSA=0), 1:256 (PS=111) OPTION_REG = (OPTION_REG &amp; 0xC0U) | 0x07U; TMR0 = TMR0_PRELOAD; TMR0IF = 0; TMR0IE = 1;</text:p>
      <text:p text:style-name="P752">// Timer1: internal clock (TMR1CS=0), prescaler 1:8 (T1CKPS=11), on (TMR1ON=1)</text:p>
      <text:p text:style-name="P753">T1CON <text:s text:c="1"/>= 0x31U;</text:p>
      <text:p text:style-name="P754">TMR1H <text:s text:c="1"/>= TMR1H_PRELOAD;</text:p>
      <text:p text:style-name="P755">TMR1L <text:s text:c="1"/>= TMR1L_PRELOAD;</text:p>
      <text:p text:style-name="P756">TMR1IF = 0;</text:p>
      <text:p text:style-name="P757">TMR1IE = 1;</text:p>
      <text:p text:style-name="P758"/>
      <text:p text:style-name="P759">PEIE = 1; <text:s text:c="2"/>// Enable peripheral interrupts (required for Timer1)</text:p>
      <text:p text:style-name="P760">GIE <text:s text:c="1"/>= 1; <text:s text:c="2"/>// Enable global interrupts</text:p>
      <text:p text:style-name="First_20_paragraph">}</text:p>
      <text:p text:style-name="Text_20_body">void reset_blink_tick(void)<text:line-break/>{ blink_tick = 0; }</text:p>
      <text:p text:style-name="Text_20_body">void reset_timeout_tick(void) { timeout_tick = 0; }</text:p>
      <text:p text:style-name="Text_20_body">/** * @brief Single ISR entry point — services Timer0 and Timer1 overflow flags. */ void __interrupt() isr(void) { if (TMR0IF) // Timer0 overflow — ~10 ms tick { TMR0 = TMR0_PRELOAD; // Reload (minor jitter acceptable for UI timing) TMR0IF = 0; blink_tick++; }</text:p>
      <text:p text:style-name="P761">if (TMR1IF) // Timer1 overflow — ~100 ms tick</text:p>
      <text:p text:style-name="P762">{</text:p>
      <text:p text:style-name="P763"><text:s text:c="4"/>TMR1H <text:s text:c="1"/>= TMR1H_PRELOAD;</text:p>
      <text:p text:style-name="P764"><text:s text:c="4"/>TMR1L <text:s text:c="1"/>= TMR1L_PRELOAD;</text:p>
      <text:p text:style-name="P765"><text:s text:c="4"/>TMR1IF = 0;</text:p>
      <text:p text:style-name="P766"><text:s text:c="4"/>if (timeout_tick &lt; 0xFFFFU) timeout_tick++; // Guard against overflow</text:p>
      <text:p text:style-name="P767">}</text:p>
      <text:p text:style-name="First_20_paragraph">}/** * @file view_logs.c * @author krubro * @date 2026-05-09 * @brief Log viewer — update/render split. <text:span text:style-name="T1"> </text:span> update() — processes navigation events, updates scroll index. No LCD. * render() — reads EEPROM entry at current index, writes LCD. <text:span text:style-name="T1"> </text:span> FIX (from previous session): gear bytes in EEPROM are raw GEAR_STATE indices * (‘0’=GR, ‘1’=GN, ‘2’=G1 … ‘C’=crash). gear_label() translates them before * display. Without this, GN stored as ‘1’ would print as “G1” — First Gear. <text:span text:style-name="T1"> </text:span> CLCD layout: * Row 1: LOG 03/10 * Row 2: HH:MM:SS GN 085 <text:span text:style-name="T1"> </text:span> UART download format: * 01 HH:MM:SS GN 085 */</text:p>
      <text:p text:style-name="Text_20_body">#include “main_config.h”</text:p>
      <text:p text:style-name="Text_20_body">/* Maps the stored gear byte to its two-character display label. * This decode step is mandatory at every read site. <text:span text:style-name="T1">/ static const char </text:span> gear_label(char g) { switch (g) { case ‘0’: return “GR”; case ‘1’: return “GN”; case ‘2’: return “G1”; case ‘3’: return “G2”; case ‘4’: return “G3”; case ‘5’: return “G4”; case ‘C’: return “CR”; default: return “??”; } }</text:p>
      <text:p text:style-name="Text_20_body">static void print_two_digits(unsigned char val, unsigned char addr) { clcd_putch((char)((val / 10U) + ‘0’), addr); clcd_putch((char)((val % 10U) + ‘0’), addr + 1U); }</text:p>
      <text:p text:style-name="Text_20_body">/* ========================================================================= * Private state * ========================================================================= */</text:p>
      <text:p text:style-name="Text_20_body">static unsigned char log_index = 0; static unsigned char needs_draw = 1; /* 1 = render must refresh the entry */ static unsigned char empty_shown = 0;</text:p>
      <text:p text:style-name="Text_20_body">void view_logs_reset(void) { log_index = 0; needs_draw = 1; empty_shown = 0; }</text:p>
      <text:p text:style-name="Text_20_body">/* ========================================================================= * UPDATE — navigation events, no LCD. * ========================================================================= */</text:p>
      <text:p text:style-name="Text_20_body">void view_logs_update(EVENT evt) { unsigned char count = eeprom_get_entry_count();</text:p>
      <text:p text:style-name="P768">if (count == 0)</text:p>
      <text:p text:style-name="P769">{</text:p>
      <text:p text:style-name="P770"><text:s text:c="4"/>if (evt == EVENT_SW1)</text:p>
      <text:p text:style-name="P771"><text:s text:c="4"/>{</text:p>
      <text:p text:style-name="P772"><text:s text:c="8"/>uart_puts("[LOGS] BACK\n");</text:p>
      <text:p text:style-name="P773"><text:s text:c="8"/>view_logs_reset();</text:p>
      <text:p text:style-name="P774"><text:s text:c="8"/>set_status(MENU);</text:p>
      <text:p text:style-name="P775"><text:s text:c="4"/>}</text:p>
      <text:p text:style-name="P776"><text:s text:c="4"/>return;</text:p>
      <text:p text:style-name="P777">}</text:p>
      <text:p text:style-name="P778"/>
      <text:p text:style-name="P779">if (evt == EVENT_SW2 &amp;&amp; log_index &lt; count - 1U)</text:p>
      <text:p text:style-name="P780">{</text:p>
      <text:p text:style-name="P781"><text:s text:c="4"/>log_index++;</text:p>
      <text:p text:style-name="P782"><text:s text:c="4"/>needs_draw = 1;</text:p>
      <text:p text:style-name="P783"><text:s text:c="4"/>uart_puts("[LOGS] NEXT\n");</text:p>
      <text:p text:style-name="P784">}</text:p>
      <text:p text:style-name="P785">else if (evt == EVENT_SW3 &amp;&amp; log_index &gt; 0U)</text:p>
      <text:p text:style-name="P786">{</text:p>
      <text:p text:style-name="P787"><text:s text:c="4"/>log_index--;</text:p>
      <text:p text:style-name="P788"><text:s text:c="4"/>needs_draw = 1;</text:p>
      <text:p text:style-name="P789"><text:s text:c="4"/>uart_puts("[LOGS] PREV\n");</text:p>
      <text:p text:style-name="P790">}</text:p>
      <text:p text:style-name="P791">else if (evt == EVENT_SW1)</text:p>
      <text:p text:style-name="P792">{</text:p>
      <text:p text:style-name="P793"><text:s text:c="4"/>uart_puts("[LOGS] BACK\n");</text:p>
      <text:p text:style-name="P794"><text:s text:c="4"/>view_logs_reset();</text:p>
      <text:p text:style-name="P795"><text:s text:c="4"/>set_status(MENU);</text:p>
      <text:p text:style-name="P796">}</text:p>
      <text:p text:style-name="First_20_paragraph">}</text:p>
      <text:p text:style-name="Text_20_body">/* ========================================================================= * RENDER — reads EEPROM at log_index, writes LCD. Skips if !needs_draw. * ========================================================================= */</text:p>
      <text:p text:style-name="Text_20_body">void view_logs_render(void) { unsigned char count = eeprom_get_entry_count(); char buf[12]; const char *gl;</text:p>
      <text:p text:style-name="P797">if (count == 0)</text:p>
      <text:p text:style-name="P798">{</text:p>
      <text:p text:style-name="P799"><text:s text:c="4"/>if (!empty_shown)</text:p>
      <text:p text:style-name="P800"><text:s text:c="4"/>{</text:p>
      <text:p text:style-name="P801"><text:s text:c="8"/>clcd_clear();</text:p>
      <text:p text:style-name="P802"><text:s text:c="8"/>clcd_print("No Logs Found <text:s text:c="2"/>", LINE1(0));</text:p>
      <text:p text:style-name="P803"><text:s text:c="8"/>clcd_print("SW1: Back <text:s text:c="6"/>", LINE2(0));</text:p>
      <text:p text:style-name="P804"><text:s text:c="8"/>uart_puts("[LOGS] empty\n");</text:p>
      <text:p text:style-name="P805"><text:s text:c="8"/>empty_shown = 1;</text:p>
      <text:p text:style-name="P806"><text:s text:c="4"/>}</text:p>
      <text:p text:style-name="P807"><text:s text:c="4"/>return;</text:p>
      <text:p text:style-name="P808">}</text:p>
      <text:p text:style-name="P809"/>
      <text:p text:style-name="P810">empty_shown = 0;</text:p>
      <text:p text:style-name="P811"/>
      <text:p text:style-name="P812">if (!needs_draw) return;</text:p>
      <text:p text:style-name="P813">needs_draw = 0;</text:p>
      <text:p text:style-name="P814"/>
      <text:p text:style-name="P815">eeprom_read_log(log_index, buf); <text:s text:c="1"/>/* "HHMMSSGxSSS\0" */</text:p>
      <text:p text:style-name="P816">gl = gear_label(buf[7]);</text:p>
      <text:p text:style-name="P817"/>
      <text:p text:style-name="P818">/* Row 1: LOG xx/xx */</text:p>
      <text:p text:style-name="P819">clcd_print("LOG ", LINE1(0));</text:p>
      <text:p text:style-name="P820">print_two_digits(log_index + 1U, LINE1(4));</text:p>
      <text:p text:style-name="P821">clcd_putch('/', <text:s text:c="18"/>LINE1(6));</text:p>
      <text:p text:style-name="P822">print_two_digits(count, <text:s text:c="10"/>LINE1(7));</text:p>
      <text:p text:style-name="P823">clcd_print(" <text:s text:c="6"/>", <text:s text:c="12"/>LINE1(9));</text:p>
      <text:p text:style-name="P824"/>
      <text:p text:style-name="P825">/* Row 2: HH:MM:SS GL SSS */</text:p>
      <text:p text:style-name="P826">clcd_putch(buf[0], LINE2(0));</text:p>
      <text:p text:style-name="P827">clcd_putch(buf[1], LINE2(1));</text:p>
      <text:p text:style-name="P828">clcd_putch(':', <text:s text:c="3"/>LINE2(2));</text:p>
      <text:p text:style-name="P829">clcd_putch(buf[2], LINE2(3));</text:p>
      <text:p text:style-name="P830">clcd_putch(buf[3], LINE2(4));</text:p>
      <text:p text:style-name="P831">clcd_putch(':', <text:s text:c="3"/>LINE2(5));</text:p>
      <text:p text:style-name="P832">clcd_putch(buf[4], LINE2(6));</text:p>
      <text:p text:style-name="P833">clcd_putch(buf[5], LINE2(7));</text:p>
      <text:p text:style-name="P834">clcd_putch(' ', <text:s text:c="3"/>LINE2(8));</text:p>
      <text:p text:style-name="P835">clcd_putch(gl[0], <text:s text:c="1"/>LINE2(9));</text:p>
      <text:p text:style-name="P836">clcd_putch(gl[1], <text:s text:c="1"/>LINE2(10));</text:p>
      <text:p text:style-name="P837">clcd_putch(' ', <text:s text:c="3"/>LINE2(11));</text:p>
      <text:p text:style-name="P838">clcd_putch(buf[8], <text:s text:c="1"/>LINE2(12));</text:p>
      <text:p text:style-name="P839">clcd_putch(buf[9], <text:s text:c="1"/>LINE2(13));</text:p>
      <text:p text:style-name="P840">clcd_putch(buf[10], LINE2(14));</text:p>
      <text:p text:style-name="P841">clcd_putch(' ', <text:s text:c="4"/>LINE2(15));</text:p>
      <text:p text:style-name="First_20_paragraph">}</text:p>
      <text:p text:style-name="Text_20_body">/* ========================================================================= * DOWNLOAD_LOGS — one-shot UART dump, auto-transitions to MENU. * ========================================================================= */</text:p>
      <text:p text:style-name="Text_20_body">void download_logs(void) { unsigned char count = eeprom_get_entry_count(); unsigned char k; char buf[12]; const char *gl;</text:p>
      <text:p text:style-name="P842">clcd_clear();</text:p>
      <text:p text:style-name="P843"/>
      <text:p text:style-name="P844">if (count == 0)</text:p>
      <text:p text:style-name="P845">{</text:p>
      <text:p text:style-name="P846"><text:s text:c="4"/>clcd_print("No Logs Found <text:s text:c="2"/>", LINE1(0));</text:p>
      <text:p text:style-name="P847"><text:s text:c="4"/>uart_puts("[DOWNLOAD] No logs stored.\n");</text:p>
      <text:p text:style-name="P848">}</text:p>
      <text:p text:style-name="P849">else</text:p>
      <text:p text:style-name="P850">{</text:p>
      <text:p text:style-name="P851"><text:s text:c="4"/>clcd_print("Sending Logs... ", LINE1(0));</text:p>
      <text:p text:style-name="P852"><text:s text:c="4"/>print_two_digits(count, LINE2(0));</text:p>
      <text:p text:style-name="P853"><text:s text:c="4"/>clcd_print(" entries <text:s text:c="7"/>", LINE2(2));</text:p>
      <text:p text:style-name="P854"/>
      <text:p text:style-name="P855"><text:s text:c="4"/>uart_puts("=== CAR BLACK BOX LOG ===\n");</text:p>
      <text:p text:style-name="P856"><text:s text:c="4"/>uart_puts("## HH:MM:SS GEAR SPD\n");</text:p>
      <text:p text:style-name="P857"/>
      <text:p text:style-name="P858"><text:s text:c="4"/>for (k = 0; k &lt; count; k++)</text:p>
      <text:p text:style-name="P859"><text:s text:c="4"/>{</text:p>
      <text:p text:style-name="P860"><text:s text:c="8"/>eeprom_read_log(k, buf);</text:p>
      <text:p text:style-name="P861"><text:s text:c="8"/>gl = gear_label(buf[7]);</text:p>
      <text:p text:style-name="P862"/>
      <text:p text:style-name="P863"><text:s text:c="8"/>uart_putchar((char)((k + 1U) / 10U + '0'));</text:p>
      <text:p text:style-name="P864"><text:s text:c="8"/>uart_putchar((char)((k + 1U) % 10U + '0'));</text:p>
      <text:p text:style-name="P865"><text:s text:c="8"/>uart_putchar(' ');</text:p>
      <text:p text:style-name="P866"><text:s text:c="8"/>uart_putchar(buf[0]); uart_putchar(buf[1]);</text:p>
      <text:p text:style-name="P867"><text:s text:c="8"/>uart_putchar(':');</text:p>
      <text:p text:style-name="P868"><text:s text:c="8"/>uart_putchar(buf[2]); uart_putchar(buf[3]);</text:p>
      <text:p text:style-name="P869"><text:s text:c="8"/>uart_putchar(':');</text:p>
      <text:p text:style-name="P870"><text:s text:c="8"/>uart_putchar(buf[4]); uart_putchar(buf[5]);</text:p>
      <text:p text:style-name="P871"><text:s text:c="8"/>uart_putchar(' ');</text:p>
      <text:p text:style-name="P872"><text:s text:c="8"/>uart_putchar(gl[0]); uart_putchar(gl[1]);</text:p>
      <text:p text:style-name="P873"><text:s text:c="8"/>uart_putchar(' ');</text:p>
      <text:p text:style-name="P874"><text:s text:c="8"/>uart_putchar(buf[8]); uart_putchar(buf[9]); uart_putchar(buf[10]);</text:p>
      <text:p text:style-name="P875"><text:s text:c="8"/>uart_puts("\r\n");</text:p>
      <text:p text:style-name="P876"><text:s text:c="4"/>}</text:p>
      <text:p text:style-name="P877"><text:s text:c="4"/>uart_puts("=========================\n");</text:p>
      <text:p text:style-name="P878">}</text:p>
      <text:p text:style-name="P879"/>
      <text:p text:style-name="P880">__delay_ms(1500);</text:p>
      <text:p text:style-name="P881">set_status(MENU);</text:p>
      <text:p text:style-name="First_20_paragraph">}</text:p>
      <text:p text:style-name="Text_20_body">/* ========================================================================= * CLEAR_LOGS * ========================================================================= */</text:p>
      <text:p text:style-name="Text_20_body">void clear_logs(void) { clcd_clear(); clcd_print(“LOGS CLEARED”, LINE1(0)); uart_puts(“[LOGS] CLEARED”); __delay_ms(300); eeprom_clear_log();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6-05-09T18:20:36Z</meta:creation-date>
    <dc:date>2026-05-09T18:20:36Z</dc:date>
  </office:meta>
</office:document-meta>
</file>